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87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1.954cm" fo:break-before="auto" style:use-optimal-row-height="true"/>
    </style:style>
    <style:style style:name="ro4" style:family="table-row">
      <style:table-row-properties style:row-height="2.339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ales outlets</text:p>
          </table:table-cell>
          <table:table-cell office:value-type="string" calcext:value-type="string">
            <text:p>Item descrip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Specification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tem category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Sales volume</text:p>
          </table:table-cell>
          <table:table-cell table:style-name="ce1" office:value-type="string" calcext:value-type="string">
            <text:p>Sale percentage</text:p>
          </table:table-cell>
          <table:table-cell office:value-type="string" calcext:value-type="string">
            <text:p>Total selling price</text:p>
          </table:table-cell>
          <table:table-cell office:value-type="string" calcext:value-type="string">
            <text:p>Revenue</text:p>
          </table:table-cell>
          <table:table-cell table:style-name="ce1" office:value-type="string" calcext:value-type="string">
            <text:p>Actual amount received comparison</text:p>
          </table:table-cell>
          <table:table-cell office:value-type="string" calcext:value-type="string">
            <text:p>Profit</text:p>
          </table:table-cell>
          <table:table-cell table:style-name="ce1" office:value-type="string" calcext:value-type="string">
            <text:p>Gross profit</text:p>
          </table:table-cell>
          <table:table-cell table:style-name="ce1" office:value-type="string" calcext:value-type="string">
            <text:p>Item brand</text:p>
          </table:table-cell>
          <table:table-cell office:value-type="string" calcext:value-type="string">
            <text:p>Item supplier (Partner)</text:p>
          </table:table-cell>
          <table:table-cell office:value-type="string" calcext:value-type="string">
            <text:p>口味金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tem without S/N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%</text:p>
          </table:table-cell>
          <table:table-cell office:value-type="float" office:value="252.1" calcext:value-type="float">
            <text:p>252.1</text:p>
          </table:table-cell>
          <table:table-cell office:value-type="float" office:value="247.3" calcext:value-type="float">
            <text:p>247.3</text:p>
          </table:table-cell>
          <table:table-cell office:value-type="string" calcext:value-type="string">
            <text:p>0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Item without S/N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office:value-type="float" office:value="1204.5" calcext:value-type="float">
            <text:p>1204.5</text:p>
          </table:table-cell>
          <table:table-cell office:value-type="float" office:value="1204.41" calcext:value-type="float">
            <text:p>1204.41</text:p>
          </table:table-cell>
          <table:table-cell office:value-type="string" calcext:value-type="string">
            <text:p>1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appiness Initiative - Relationship Journal</text:p>
          </table:table-cell>
          <table:table-cell office:value-type="float" office:value="710497121514" calcext:value-type="float">
            <text:p>710497121514</text:p>
          </table:table-cell>
          <table:table-cell office:value-type="string" calcext:value-type="string">
            <text:p>Ocean (Blue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9.9" calcext:value-type="float">
            <text:p>59.9</text:p>
          </table:table-cell>
          <table:table-cell office:value-type="string" calcext:value-type="string">
            <text:p>0.09%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Relationship Journal</text:p>
          </table:table-cell>
          <table:table-cell office:value-type="float" office:value="710497121521" calcext:value-type="float">
            <text:p>710497121521</text:p>
          </table:table-cell>
          <table:table-cell office:value-type="string" calcext:value-type="string">
            <text:p>Trees (Green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9.9" calcext:value-type="float">
            <text:p>59.9</text:p>
          </table:table-cell>
          <table:table-cell office:value-type="string" calcext:value-type="string">
            <text:p>0.09%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appiness Initiative - Relationship Journal</text:p>
          </table:table-cell>
          <table:table-cell office:value-type="float" office:value="710497121521" calcext:value-type="float">
            <text:p>710497121521</text:p>
          </table:table-cell>
          <table:table-cell office:value-type="string" calcext:value-type="string">
            <text:p>Trees (Green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9.9" calcext:value-type="float">
            <text:p>59.9</text:p>
          </table:table-cell>
          <table:table-cell office:value-type="string" calcext:value-type="string">
            <text:p>0.09%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Well-Being Journal</text:p>
          </table:table-cell>
          <table:table-cell office:value-type="float" office:value="710497121538" calcext:value-type="float">
            <text:p>7104971215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3.9" calcext:value-type="float">
            <text:p>43.9</text:p>
          </table:table-cell>
          <table:table-cell office:value-type="string" calcext:value-type="string">
            <text:p>0.07%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34.99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Well-Being Journal</text:p>
          </table:table-cell>
          <table:table-cell office:value-type="float" office:value="710497121545" calcext:value-type="float">
            <text:p>71049712154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87.8" calcext:value-type="float">
            <text:p>87.8</text:p>
          </table:table-cell>
          <table:table-cell office:value-type="float" office:value="83.41" calcext:value-type="float">
            <text:p>83.41</text:p>
          </table:table-cell>
          <table:table-cell office:value-type="string" calcext:value-type="string">
            <text:p>0.13%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31.5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appiness Initiative - Well-Being Journal</text:p>
          </table:table-cell>
          <table:table-cell office:value-type="float" office:value="710497121545" calcext:value-type="float">
            <text:p>71049712154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3.9" calcext:value-type="float">
            <text:p>43.9</text:p>
          </table:table-cell>
          <table:table-cell office:value-type="string" calcext:value-type="string">
            <text:p>0.07%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34.99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Circle of Gratitude Cards</text:p>
          </table:table-cell>
          <table:table-cell office:value-type="float" office:value="710497121576" calcext:value-type="float">
            <text:p>710497121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86.7" calcext:value-type="float">
            <text:p>86.7</text:p>
          </table:table-cell>
          <table:table-cell office:value-type="string" calcext:value-type="string">
            <text:p>0.13%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Let's Unpack This Card Game</text:p>
          </table:table-cell>
          <table:table-cell office:value-type="float" office:value="764460637434" calcext:value-type="float">
            <text:p>764460637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79.8" calcext:value-type="float">
            <text:p>79.8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0.12%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40.1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appiness Initiative - What Truly Matters Card Game</text:p>
          </table:table-cell>
          <table:table-cell office:value-type="float" office:value="764460637458" calcext:value-type="float">
            <text:p>764460637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9.8" calcext:value-type="float">
            <text:p>79.8</text:p>
          </table:table-cell>
          <table:table-cell office:value-type="string" calcext:value-type="string">
            <text:p>0.12%</text:p>
          </table:table-cell>
          <table:table-cell office:value-type="float" office:value="29.34" calcext:value-type="float">
            <text:p>29.34</text:p>
          </table:table-cell>
          <table:table-cell office:value-type="string" calcext:value-type="string">
            <text:p>36.77%</text:p>
          </table:table-cell>
          <table:table-cell/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lette Puzzles - Chasing Sunset</text:p>
          </table:table-cell>
          <table:table-cell office:value-type="float" office:value="768173999735" calcext:value-type="float">
            <text:p>7681739997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0.09%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lette Puzzl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Not Any Shopping Bag Blind Box</text:p>
          </table:table-cell>
          <table:table-cell office:value-type="float" office:value="101002" calcext:value-type="float">
            <text:p>101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0.06%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1224567891010" calcext:value-type="float">
            <text:p>1224567891010</text:p>
          </table:table-cell>
          <table:table-cell office:value-type="string" calcext:value-type="string">
            <text:p>Amber &amp; Ash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.09%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1224567891027" calcext:value-type="float">
            <text:p>1224567891027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.09%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1224567891041" calcext:value-type="float">
            <text:p>1224567891041</text:p>
          </table:table-cell>
          <table:table-cell office:value-type="string" calcext:value-type="string">
            <text:p>Eucalyptus &amp; Min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4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.8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1224567891133" calcext:value-type="float">
            <text:p>1224567891133</text:p>
          </table:table-cell>
          <table:table-cell office:value-type="string" calcext:value-type="string">
            <text:p>Merry Mistleto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1224567891171" calcext:value-type="float">
            <text:p>1224567891171</text:p>
          </table:table-cell>
          <table:table-cell office:value-type="string" calcext:value-type="string">
            <text:p>Vanilla &amp; Spic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19" calcext:value-type="float">
            <text:p>1234567891019</text:p>
          </table:table-cell>
          <table:table-cell office:value-type="string" calcext:value-type="string">
            <text:p>Amber &amp; Ash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26" calcext:value-type="float">
            <text:p>1234567891026</text:p>
          </table:table-cell>
          <table:table-cell office:value-type="string" calcext:value-type="string">
            <text:p>Brown Sugar &amp; Fig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40" calcext:value-type="float">
            <text:p>1234567891040</text:p>
          </table:table-cell>
          <table:table-cell office:value-type="string" calcext:value-type="string">
            <text:p>Clean Cotto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57" calcext:value-type="float">
            <text:p>1234567891057</text:p>
          </table:table-cell>
          <table:table-cell office:value-type="string" calcext:value-type="string">
            <text:p>Eucalyptus &amp; Min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88" calcext:value-type="float">
            <text:p>1234567891088</text:p>
          </table:table-cell>
          <table:table-cell office:value-type="string" calcext:value-type="string">
            <text:p>Island Coconu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0.02%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48.4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095" calcext:value-type="float">
            <text:p>1234567891095</text:p>
          </table:table-cell>
          <table:table-cell office:value-type="string" calcext:value-type="string">
            <text:p>Island Driftwoo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18" calcext:value-type="float">
            <text:p>1234567891118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32" calcext:value-type="float">
            <text:p>1234567891132</text:p>
          </table:table-cell>
          <table:table-cell office:value-type="string" calcext:value-type="string">
            <text:p>Merry Mistleto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49" calcext:value-type="float">
            <text:p>1234567891149</text:p>
          </table:table-cell>
          <table:table-cell office:value-type="string" calcext:value-type="string">
            <text:p>Mountain Rai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56" calcext:value-type="float">
            <text:p>1234567891156</text:p>
          </table:table-cell>
          <table:table-cell office:value-type="string" calcext:value-type="string">
            <text:p>Sandalwood &amp; Citru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87" calcext:value-type="float">
            <text:p>1234567891187</text:p>
          </table:table-cell>
          <table:table-cell office:value-type="string" calcext:value-type="string">
            <text:p>White Lil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1234567891194" calcext:value-type="float">
            <text:p>1234567891194</text:p>
          </table:table-cell>
          <table:table-cell office:value-type="string" calcext:value-type="string">
            <text:p>Wild Ros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iau Candle (Large)</text:p>
          </table:table-cell>
          <table:table-cell office:value-type="float" office:value="1244567891018" calcext:value-type="float">
            <text:p>1244567891018</text:p>
          </table:table-cell>
          <table:table-cell office:value-type="string" calcext:value-type="string">
            <text:p>Amber &amp; Ash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Large)</text:p>
          </table:table-cell>
          <table:table-cell office:value-type="float" office:value="1244567891100" calcext:value-type="float">
            <text:p>1244567891100</text:p>
          </table:table-cell>
          <table:table-cell office:value-type="string" calcext:value-type="string">
            <text:p>Island Driftwoo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.12%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Large)</text:p>
          </table:table-cell>
          <table:table-cell office:value-type="float" office:value="1244567891124" calcext:value-type="float">
            <text:p>1244567891124</text:p>
          </table:table-cell>
          <table:table-cell office:value-type="string" calcext:value-type="string">
            <text:p>Lemongrass Te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.12%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Large)</text:p>
          </table:table-cell>
          <table:table-cell office:value-type="float" office:value="1244567891155" calcext:value-type="float">
            <text:p>1244567891155</text:p>
          </table:table-cell>
          <table:table-cell office:value-type="string" calcext:value-type="string">
            <text:p>Sandalwood &amp; Citru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iau Candle (Large)</text:p>
          </table:table-cell>
          <table:table-cell office:value-type="float" office:value="1244567891209" calcext:value-type="float">
            <text:p>1244567891209</text:p>
          </table:table-cell>
          <table:table-cell office:value-type="string" calcext:value-type="string">
            <text:p>Coffee &amp; Crea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4%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30.36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Double)</text:p>
          </table:table-cell>
          <table:table-cell office:value-type="float" office:value="1245567891107" calcext:value-type="float">
            <text:p>1245567891107</text:p>
          </table:table-cell>
          <table:table-cell office:value-type="string" calcext:value-type="string">
            <text:p>Island Driftwoo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.09%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Roti Pouch</text:p>
          </table:table-cell>
          <table:table-cell office:value-type="float" office:value="200001" calcext:value-type="float">
            <text:p>2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0.09%</text:p>
          </table:table-cell>
          <table:table-cell office:value-type="float" office:value="23.24" calcext:value-type="float">
            <text:p>23.24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Essential Pouch</text:p>
          </table:table-cell>
          <table:table-cell office:value-type="float" office:value="200002" calcext:value-type="float">
            <text:p>2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mond Oat Cookies</text:p>
          </table:table-cell>
          <table:table-cell office:value-type="float" office:value="2111253000070" calcext:value-type="float">
            <text:p>2111253000070</text:p>
          </table:table-cell>
          <table:table-cell office:value-type="string" calcext:value-type="string">
            <text:p>2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01%</text:p>
          </table:table-cell>
          <table:table-cell office:value-type="float" office:value="264" calcext:value-type="float">
            <text:p>264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0.40%</text:p>
          </table:table-cell>
          <table:table-cell office:value-type="float" office:value="217.9" calcext:value-type="float">
            <text:p>217.9</text:p>
          </table:table-cell>
          <table:table-cell office:value-type="string" calcext:value-type="string">
            <text:p>84.62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mond Oat Cookies</text:p>
          </table:table-cell>
          <table:table-cell office:value-type="float" office:value="2111253000070" calcext:value-type="float">
            <text:p>2111253000070</text:p>
          </table:table-cell>
          <table:table-cell office:value-type="string" calcext:value-type="string">
            <text:p>2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office:value-type="float" office:value="48" calcext:value-type="float">
            <text:p>48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0.07%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83.1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mond Oat Cookies</text:p>
          </table:table-cell>
          <table:table-cell office:value-type="string" calcext:value-type="string">
            <text:p>2111253000070-1</text:p>
          </table:table-cell>
          <table:table-cell office:value-type="string" calcext:value-type="string">
            <text:p>4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office:value-type="float" office:value="72" calcext:value-type="float">
            <text:p>72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0.10%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77.5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mond Oat Cookies</text:p>
          </table:table-cell>
          <table:table-cell office:value-type="string" calcext:value-type="string">
            <text:p>2111253000070-1</text:p>
          </table:table-cell>
          <table:table-cell office:value-type="string" calcext:value-type="string">
            <text:p>4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%</text:p>
          </table:table-cell>
          <table:table-cell office:value-type="float" office:value="66" calcext:value-type="float">
            <text:p>66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0.09%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77.0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memade Banana Bread (Per Slice)</text:p>
          </table:table-cell>
          <table:table-cell office:value-type="float" office:value="2111253000117" calcext:value-type="float">
            <text:p>2111253000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.61%</text:p>
          </table:table-cell>
          <table:table-cell office:value-type="float" office:value="684" calcext:value-type="float">
            <text:p>684</text:p>
          </table:table-cell>
          <table:table-cell office:value-type="float" office:value="647.2" calcext:value-type="float">
            <text:p>647.2</text:p>
          </table:table-cell>
          <table:table-cell office:value-type="string" calcext:value-type="string">
            <text:p>1.00%</text:p>
          </table:table-cell>
          <table:table-cell office:value-type="float" office:value="537.76" calcext:value-type="float">
            <text:p>537.76</text:p>
          </table:table-cell>
          <table:table-cell office:value-type="string" calcext:value-type="string">
            <text:p>83.0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omemade Banana Bread (Per Slice)</text:p>
          </table:table-cell>
          <table:table-cell office:value-type="float" office:value="2111253000117" calcext:value-type="float">
            <text:p>2111253000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.57%</text:p>
          </table:table-cell>
          <table:table-cell office:value-type="float" office:value="412" calcext:value-type="float">
            <text:p>412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0.62%</text:p>
          </table:table-cell>
          <table:table-cell office:value-type="float" office:value="338.48" calcext:value-type="float">
            <text:p>338.48</text:p>
          </table:table-cell>
          <table:table-cell office:value-type="string" calcext:value-type="string">
            <text:p>83.7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rotein Balls</text:p>
          </table:table-cell>
          <table:table-cell office:value-type="float" office:value="2111253000179" calcext:value-type="float">
            <text:p>2111253000179</text:p>
          </table:table-cell>
          <table:table-cell office:value-type="string" calcext:value-type="string">
            <text:p>2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3%</text:p>
          </table:table-cell>
          <table:table-cell office:value-type="float" office:value="140" calcext:value-type="float">
            <text:p>140</text:p>
          </table:table-cell>
          <table:table-cell office:value-type="float" office:value="136.29" calcext:value-type="float">
            <text:p>136.29</text:p>
          </table:table-cell>
          <table:table-cell office:value-type="string" calcext:value-type="string">
            <text:p>0.21%</text:p>
          </table:table-cell>
          <table:table-cell office:value-type="float" office:value="134.89" calcext:value-type="float">
            <text:p>134.89</text:p>
          </table:table-cell>
          <table:table-cell office:value-type="string" calcext:value-type="string">
            <text:p>98.9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rotein Balls</text:p>
          </table:table-cell>
          <table:table-cell office:value-type="string" calcext:value-type="string">
            <text:p>2111253000179-1</text:p>
          </table:table-cell>
          <table:table-cell office:value-type="string" calcext:value-type="string">
            <text:p>4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2%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94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hini Billionaire Bar</text:p>
          </table:table-cell>
          <table:table-cell office:value-type="float" office:value="2111253000209" calcext:value-type="float">
            <text:p>2111253000209</text:p>
          </table:table-cell>
          <table:table-cell office:value-type="string" calcext:value-type="string">
            <text:p>1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3%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17%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hini Billionaire Bar</text:p>
          </table:table-cell>
          <table:table-cell office:value-type="string" calcext:value-type="string">
            <text:p>2111253000209-1</text:p>
          </table:table-cell>
          <table:table-cell office:value-type="string" calcext:value-type="string">
            <text:p>3pc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19%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81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mericano</text:p>
          </table:table-cell>
          <table:table-cell office:value-type="float" office:value="2111253000216" calcext:value-type="float">
            <text:p>2111253000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6580" calcext:value-type="float">
            <text:p>9965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4%</text:p>
          </table:table-cell>
          <table:table-cell office:value-type="float" office:value="364.5" calcext:value-type="float">
            <text:p>364.5</text:p>
          </table:table-cell>
          <table:table-cell office:value-type="float" office:value="361.8" calcext:value-type="float">
            <text:p>361.8</text:p>
          </table:table-cell>
          <table:table-cell office:value-type="string" calcext:value-type="string">
            <text:p>0.56%</text:p>
          </table:table-cell>
          <table:table-cell office:value-type="float" office:value="321.3" calcext:value-type="float">
            <text:p>321.3</text:p>
          </table:table-cell>
          <table:table-cell office:value-type="string" calcext:value-type="string">
            <text:p>88.8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mericano</text:p>
          </table:table-cell>
          <table:table-cell office:value-type="float" office:value="2111253000216" calcext:value-type="float">
            <text:p>2111253000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409" calcext:value-type="float">
            <text:p>99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%</text:p>
          </table:table-cell>
          <table:table-cell office:value-type="float" office:value="99" calcext:value-type="float">
            <text:p>99</text:p>
          </table:table-cell>
          <table:table-cell office:value-type="float" office:value="97.65" calcext:value-type="float">
            <text:p>97.65</text:p>
          </table:table-cell>
          <table:table-cell office:value-type="string" calcext:value-type="string">
            <text:p>0.15%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88.74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2111253000216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6284" calcext:value-type="float">
            <text:p>9962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27%</text:p>
          </table:table-cell>
          <table:table-cell office:value-type="float" office:value="456.5" calcext:value-type="float">
            <text:p>456.5</text:p>
          </table:table-cell>
          <table:table-cell office:value-type="float" office:value="450.7" calcext:value-type="float">
            <text:p>450.7</text:p>
          </table:table-cell>
          <table:table-cell office:value-type="string" calcext:value-type="string">
            <text:p>0.70%</text:p>
          </table:table-cell>
          <table:table-cell office:value-type="float" office:value="409.2" calcext:value-type="float">
            <text:p>409.2</text:p>
          </table:table-cell>
          <table:table-cell office:value-type="string" calcext:value-type="string">
            <text:p>90.7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2111253000216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340" calcext:value-type="float">
            <text:p>993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%</text:p>
          </table:table-cell>
          <table:table-cell office:value-type="float" office:value="121" calcext:value-type="float">
            <text:p>121</text:p>
          </table:table-cell>
          <table:table-cell office:value-type="float" office:value="119.35" calcext:value-type="float">
            <text:p>119.35</text:p>
          </table:table-cell>
          <table:table-cell office:value-type="string" calcext:value-type="string">
            <text:p>0.18%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90.7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appuccino</text:p>
          </table:table-cell>
          <table:table-cell office:value-type="float" office:value="2111253000223" calcext:value-type="float">
            <text:p>211125300022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548" calcext:value-type="float">
            <text:p>9985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9%</text:p>
          </table:table-cell>
          <table:table-cell table:number-columns-repeated="2" office:value-type="float" office:value="105.5" calcext:value-type="float">
            <text:p>105.5</text:p>
          </table:table-cell>
          <table:table-cell office:value-type="string" calcext:value-type="string">
            <text:p>0.16%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82.35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appuccino</text:p>
          </table:table-cell>
          <table:table-cell office:value-type="float" office:value="2111253000223" calcext:value-type="float">
            <text:p>211125300022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656" calcext:value-type="float">
            <text:p>996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.11%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82.96%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111253000223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3334" calcext:value-type="float">
            <text:p>99333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3%</text:p>
          </table:table-cell>
          <table:table-cell office:value-type="float" office:value="1110.5" calcext:value-type="float">
            <text:p>1110.5</text:p>
          </table:table-cell>
          <table:table-cell office:value-type="float" office:value="1091.65" calcext:value-type="float">
            <text:p>1091.65</text:p>
          </table:table-cell>
          <table:table-cell office:value-type="string" calcext:value-type="string">
            <text:p>1.69%</text:p>
          </table:table-cell>
          <table:table-cell office:value-type="float" office:value="909.05" calcext:value-type="float">
            <text:p>909.05</text:p>
          </table:table-cell>
          <table:table-cell office:value-type="string" calcext:value-type="string">
            <text:p>83.27%</text:p>
          </table:table-cell>
          <table:table-cell/>
          <table:table-cell table:style-name="ce2"/>
          <table:table-cell office:value-type="float" office:value="30.5" calcext:value-type="float">
            <text:p>3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111253000223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8579" calcext:value-type="float">
            <text:p>985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69%</text:p>
          </table:table-cell>
          <table:table-cell office:value-type="float" office:value="295.5" calcext:value-type="float">
            <text:p>295.5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0.45%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83.02%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111253000223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547" calcext:value-type="float">
            <text:p>9985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4%</text:p>
          </table:table-cell>
          <table:table-cell office:value-type="float" office:value="193" calcext:value-type="float">
            <text:p>193</text:p>
          </table:table-cell>
          <table:table-cell office:value-type="float" office:value="189.1" calcext:value-type="float">
            <text:p>189.1</text:p>
          </table:table-cell>
          <table:table-cell office:value-type="string" calcext:value-type="string">
            <text:p>0.29%</text:p>
          </table:table-cell>
          <table:table-cell office:value-type="float" office:value="160.68" calcext:value-type="float">
            <text:p>160.68</text:p>
          </table:table-cell>
          <table:table-cell office:value-type="string" calcext:value-type="string">
            <text:p>84.97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111253000223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560" calcext:value-type="float">
            <text:p>995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%</text:p>
          </table:table-cell>
          <table:table-cell table:number-columns-repeated="2" office:value-type="float" office:value="115.5" calcext:value-type="float">
            <text:p>115.5</text:p>
          </table:table-cell>
          <table:table-cell office:value-type="string" calcext:value-type="string">
            <text:p>0.18%</text:p>
          </table:table-cell>
          <table:table-cell office:value-type="float" office:value="98.84" calcext:value-type="float">
            <text:p>98.84</text:p>
          </table:table-cell>
          <table:table-cell office:value-type="string" calcext:value-type="string">
            <text:p>85.58%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Espresso</text:p>
          </table:table-cell>
          <table:table-cell office:value-type="float" office:value="2111253000230" calcext:value-type="float">
            <text:p>21112530002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887" calcext:value-type="float">
            <text:p>9988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4%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.18%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87.5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Espresso</text:p>
          </table:table-cell>
          <table:table-cell office:value-type="float" office:value="2111253000230" calcext:value-type="float">
            <text:p>21112530002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642" calcext:value-type="float">
            <text:p>96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5%</text:p>
          </table:table-cell>
          <table:table-cell office:value-type="float" office:value="144" calcext:value-type="float">
            <text:p>144</text:p>
          </table:table-cell>
          <table:table-cell office:value-type="float" office:value="139.6" calcext:value-type="float">
            <text:p>139.6</text:p>
          </table:table-cell>
          <table:table-cell office:value-type="string" calcext:value-type="string">
            <text:p>0.22%</text:p>
          </table:table-cell>
          <table:table-cell office:value-type="float" office:value="121.6" calcext:value-type="float">
            <text:p>121.6</text:p>
          </table:table-cell>
          <table:table-cell office:value-type="string" calcext:value-type="string">
            <text:p>87.1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lat White</text:p>
          </table:table-cell>
          <table:table-cell office:value-type="float" office:value="2111253000247" calcext:value-type="float">
            <text:p>2111253000247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141" calcext:value-type="float">
            <text:p>9981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9%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string" calcext:value-type="string">
            <text:p>0.17%</text:p>
          </table:table-cell>
          <table:table-cell office:value-type="float" office:value="88.88" calcext:value-type="float">
            <text:p>88.88</text:p>
          </table:table-cell>
          <table:table-cell office:value-type="string" calcext:value-type="string">
            <text:p>82.68%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Flat White</text:p>
          </table:table-cell>
          <table:table-cell office:value-type="float" office:value="2111253000247" calcext:value-type="float">
            <text:p>2111253000247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277" calcext:value-type="float">
            <text:p>92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40%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0.23%</text:p>
          </table:table-cell>
          <table:table-cell office:value-type="float" office:value="121.52" calcext:value-type="float">
            <text:p>121.52</text:p>
          </table:table-cell>
          <table:table-cell office:value-type="string" calcext:value-type="string">
            <text:p>82.67%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lat White</text:p>
          </table:table-cell>
          <table:table-cell office:value-type="string" calcext:value-type="string">
            <text:p>2111253000247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2465" calcext:value-type="float">
            <text:p>99246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.61%</text:p>
          </table:table-cell>
          <table:table-cell office:value-type="float" office:value="1137.5" calcext:value-type="float">
            <text:p>1137.5</text:p>
          </table:table-cell>
          <table:table-cell office:value-type="float" office:value="1122.41" calcext:value-type="float">
            <text:p>1122.41</text:p>
          </table:table-cell>
          <table:table-cell office:value-type="string" calcext:value-type="string">
            <text:p>1.73%</text:p>
          </table:table-cell>
          <table:table-cell office:value-type="float" office:value="934.31" calcext:value-type="float">
            <text:p>934.31</text:p>
          </table:table-cell>
          <table:table-cell office:value-type="string" calcext:value-type="string">
            <text:p>83.24%</text:p>
          </table:table-cell>
          <table:table-cell/>
          <table:table-cell table:style-name="ce2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Flat White</text:p>
          </table:table-cell>
          <table:table-cell office:value-type="string" calcext:value-type="string">
            <text:p>2111253000247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7548" calcext:value-type="float">
            <text:p>754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33%</text:p>
          </table:table-cell>
          <table:table-cell office:value-type="float" office:value="576.5" calcext:value-type="float">
            <text:p>576.5</text:p>
          </table:table-cell>
          <table:table-cell office:value-type="float" office:value="569.35" calcext:value-type="float">
            <text:p>569.35</text:p>
          </table:table-cell>
          <table:table-cell office:value-type="string" calcext:value-type="string">
            <text:p>0.88%</text:p>
          </table:table-cell>
          <table:table-cell office:value-type="float" office:value="473.65" calcext:value-type="float">
            <text:p>473.65</text:p>
          </table:table-cell>
          <table:table-cell office:value-type="string" calcext:value-type="string">
            <text:p>83.19%</text:p>
          </table:table-cell>
          <table:table-cell/>
          <table:table-cell table:style-name="ce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lat White</text:p>
          </table:table-cell>
          <table:table-cell office:value-type="string" calcext:value-type="string">
            <text:p>2111253000247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7935" calcext:value-type="float">
            <text:p>9979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60%</text:p>
          </table:table-cell>
          <table:table-cell office:value-type="float" office:value="262.5" calcext:value-type="float">
            <text:p>262.5</text:p>
          </table:table-cell>
          <table:table-cell office:value-type="float" office:value="260.35" calcext:value-type="float">
            <text:p>260.35</text:p>
          </table:table-cell>
          <table:table-cell office:value-type="string" calcext:value-type="string">
            <text:p>0.40%</text:p>
          </table:table-cell>
          <table:table-cell office:value-type="float" office:value="222.13" calcext:value-type="float">
            <text:p>222.13</text:p>
          </table:table-cell>
          <table:table-cell office:value-type="string" calcext:value-type="string">
            <text:p>85.32%</text:p>
          </table:table-cell>
          <table:table-cell/>
          <table:table-cell table:style-name="ce2"/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Flat White</text:p>
          </table:table-cell>
          <table:table-cell office:value-type="string" calcext:value-type="string">
            <text:p>2111253000247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8980" calcext:value-type="float">
            <text:p>989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6%</text:p>
          </table:table-cell>
          <table:table-cell office:value-type="float" office:value="249.5" calcext:value-type="float">
            <text:p>249.5</text:p>
          </table:table-cell>
          <table:table-cell office:value-type="float" office:value="247.55" calcext:value-type="float">
            <text:p>247.55</text:p>
          </table:table-cell>
          <table:table-cell office:value-type="string" calcext:value-type="string">
            <text:p>0.38%</text:p>
          </table:table-cell>
          <table:table-cell office:value-type="float" office:value="211.29" calcext:value-type="float">
            <text:p>211.29</text:p>
          </table:table-cell>
          <table:table-cell office:value-type="string" calcext:value-type="string">
            <text:p>85.35%</text:p>
          </table:table-cell>
          <table:table-cell/>
          <table:table-cell table:style-name="ce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atte</text:p>
          </table:table-cell>
          <table:table-cell office:value-type="float" office:value="2111253000254" calcext:value-type="float">
            <text:p>211125300025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394" calcext:value-type="float">
            <text:p>9983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.12%</text:p>
          </table:table-cell>
          <table:table-cell office:value-type="float" office:value="65.28" calcext:value-type="float">
            <text:p>65.28</text:p>
          </table:table-cell>
          <table:table-cell office:value-type="string" calcext:value-type="string">
            <text:p>82.63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atte</text:p>
          </table:table-cell>
          <table:table-cell office:value-type="float" office:value="2111253000254" calcext:value-type="float">
            <text:p>211125300025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466" calcext:value-type="float">
            <text:p>94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0%</text:p>
          </table:table-cell>
          <table:table-cell office:value-type="float" office:value="182.5" calcext:value-type="float">
            <text:p>182.5</text:p>
          </table:table-cell>
          <table:table-cell office:value-type="float" office:value="170.4" calcext:value-type="float">
            <text:p>170.4</text:p>
          </table:table-cell>
          <table:table-cell office:value-type="string" calcext:value-type="string">
            <text:p>0.26%</text:p>
          </table:table-cell>
          <table:table-cell office:value-type="float" office:value="138.06" calcext:value-type="float">
            <text:p>138.06</text:p>
          </table:table-cell>
          <table:table-cell office:value-type="string" calcext:value-type="string">
            <text:p>81.02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2111253000254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1835" calcext:value-type="float">
            <text:p>9918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.76%</text:p>
          </table:table-cell>
          <table:table-cell office:value-type="float" office:value="1217.5" calcext:value-type="float">
            <text:p>1217.5</text:p>
          </table:table-cell>
          <table:table-cell office:value-type="float" office:value="1188.15" calcext:value-type="float">
            <text:p>1188.15</text:p>
          </table:table-cell>
          <table:table-cell office:value-type="string" calcext:value-type="string">
            <text:p>1.84%</text:p>
          </table:table-cell>
          <table:table-cell office:value-type="float" office:value="989.05" calcext:value-type="float">
            <text:p>989.05</text:p>
          </table:table-cell>
          <table:table-cell office:value-type="string" calcext:value-type="string">
            <text:p>83.24%</text:p>
          </table:table-cell>
          <table:table-cell/>
          <table:table-cell table:style-name="ce2"/>
          <table:table-cell office:value-type="float" office:value="39.77" calcext:value-type="float">
            <text:p>39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2111253000254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7989" calcext:value-type="float">
            <text:p>979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99%</text:p>
          </table:table-cell>
          <table:table-cell office:value-type="float" office:value="432.5" calcext:value-type="float">
            <text:p>432.5</text:p>
          </table:table-cell>
          <table:table-cell office:value-type="float" office:value="424.2" calcext:value-type="float">
            <text:p>424.2</text:p>
          </table:table-cell>
          <table:table-cell office:value-type="string" calcext:value-type="string">
            <text:p>0.66%</text:p>
          </table:table-cell>
          <table:table-cell office:value-type="float" office:value="352.7" calcext:value-type="float">
            <text:p>352.7</text:p>
          </table:table-cell>
          <table:table-cell office:value-type="string" calcext:value-type="string">
            <text:p>83.14%</text:p>
          </table:table-cell>
          <table:table-cell/>
          <table:table-cell table:style-name="ce2"/>
          <table:table-cell office:value-type="float" office:value="9.76" calcext:value-type="float">
            <text:p>9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2111253000254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1184" calcext:value-type="float">
            <text:p>99118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.46%</text:p>
          </table:table-cell>
          <table:table-cell office:value-type="float" office:value="1085.5" calcext:value-type="float">
            <text:p>1085.5</text:p>
          </table:table-cell>
          <table:table-cell office:value-type="float" office:value="1072.45" calcext:value-type="float">
            <text:p>1072.45</text:p>
          </table:table-cell>
          <table:table-cell office:value-type="string" calcext:value-type="string">
            <text:p>1.66%</text:p>
          </table:table-cell>
          <table:table-cell office:value-type="float" office:value="914.67" calcext:value-type="float">
            <text:p>914.67</text:p>
          </table:table-cell>
          <table:table-cell office:value-type="string" calcext:value-type="string">
            <text:p>85.29%</text:p>
          </table:table-cell>
          <table:table-cell/>
          <table:table-cell table:style-name="ce2"/>
          <table:table-cell office:value-type="float" office:value="38.56" calcext:value-type="float">
            <text:p>38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2111253000254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7344" calcext:value-type="float">
            <text:p>734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48%</text:p>
          </table:table-cell>
          <table:table-cell office:value-type="float" office:value="640.5" calcext:value-type="float">
            <text:p>640.5</text:p>
          </table:table-cell>
          <table:table-cell office:value-type="float" office:value="633.5" calcext:value-type="float">
            <text:p>633.5</text:p>
          </table:table-cell>
          <table:table-cell office:value-type="string" calcext:value-type="string">
            <text:p>0.98%</text:p>
          </table:table-cell>
          <table:table-cell office:value-type="float" office:value="538.44" calcext:value-type="float">
            <text:p>538.44</text:p>
          </table:table-cell>
          <table:table-cell office:value-type="string" calcext:value-type="string">
            <text:p>84.99%</text:p>
          </table:table-cell>
          <table:table-cell/>
          <table:table-cell table:style-name="ce2"/>
          <table:table-cell office:value-type="float" office:value="9.76" calcext:value-type="float">
            <text:p>9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ong Black</text:p>
          </table:table-cell>
          <table:table-cell office:value-type="float" office:value="2111253000261" calcext:value-type="float">
            <text:p>2111253000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6086" calcext:value-type="float">
            <text:p>9960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36%</text:p>
          </table:table-cell>
          <table:table-cell office:value-type="float" office:value="401.5" calcext:value-type="float">
            <text:p>401.5</text:p>
          </table:table-cell>
          <table:table-cell office:value-type="float" office:value="395.65" calcext:value-type="float">
            <text:p>395.65</text:p>
          </table:table-cell>
          <table:table-cell office:value-type="string" calcext:value-type="string">
            <text:p>0.61%</text:p>
          </table:table-cell>
          <table:table-cell office:value-type="float" office:value="351.15" calcext:value-type="float">
            <text:p>351.15</text:p>
          </table:table-cell>
          <table:table-cell office:value-type="string" calcext:value-type="string">
            <text:p>88.75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ong Black</text:p>
          </table:table-cell>
          <table:table-cell office:value-type="float" office:value="2111253000261" calcext:value-type="float">
            <text:p>2111253000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8598" calcext:value-type="float">
            <text:p>985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72%</text:p>
          </table:table-cell>
          <table:table-cell office:value-type="float" office:value="213.5" calcext:value-type="float">
            <text:p>213.5</text:p>
          </table:table-cell>
          <table:table-cell office:value-type="float" office:value="213.05" calcext:value-type="float">
            <text:p>213.05</text:p>
          </table:table-cell>
          <table:table-cell office:value-type="string" calcext:value-type="string">
            <text:p>0.33%</text:p>
          </table:table-cell>
          <table:table-cell office:value-type="float" office:value="189.55" calcext:value-type="float">
            <text:p>189.55</text:p>
          </table:table-cell>
          <table:table-cell office:value-type="string" calcext:value-type="string">
            <text:p>88.97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ong Black</text:p>
          </table:table-cell>
          <table:table-cell office:value-type="string" calcext:value-type="string">
            <text:p>2111253000261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7186" calcext:value-type="float">
            <text:p>9971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81%</text:p>
          </table:table-cell>
          <table:table-cell office:value-type="float" office:value="291.5" calcext:value-type="float">
            <text:p>291.5</text:p>
          </table:table-cell>
          <table:table-cell office:value-type="float" office:value="281.6" calcext:value-type="float">
            <text:p>281.6</text:p>
          </table:table-cell>
          <table:table-cell office:value-type="string" calcext:value-type="string">
            <text:p>0.44%</text:p>
          </table:table-cell>
          <table:table-cell office:value-type="float" office:value="255.1" calcext:value-type="float">
            <text:p>255.1</text:p>
          </table:table-cell>
          <table:table-cell office:value-type="string" calcext:value-type="string">
            <text:p>90.5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ong Black</text:p>
          </table:table-cell>
          <table:table-cell office:value-type="string" calcext:value-type="string">
            <text:p>2111253000261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018" calcext:value-type="float">
            <text:p>99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3%</text:p>
          </table:table-cell>
          <table:table-cell office:value-type="float" office:value="192.5" calcext:value-type="float">
            <text:p>192.5</text:p>
          </table:table-cell>
          <table:table-cell office:value-type="float" office:value="190.3" calcext:value-type="float">
            <text:p>190.3</text:p>
          </table:table-cell>
          <table:table-cell office:value-type="string" calcext:value-type="string">
            <text:p>0.29%</text:p>
          </table:table-cell>
          <table:table-cell office:value-type="float" office:value="172.8" calcext:value-type="float">
            <text:p>172.8</text:p>
          </table:table-cell>
          <table:table-cell office:value-type="string" calcext:value-type="string">
            <text:p>90.8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cchiatto</text:p>
          </table:table-cell>
          <table:table-cell office:value-type="float" office:value="2111253000278" calcext:value-type="float">
            <text:p>2111253000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9734" calcext:value-type="float">
            <text:p>9997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office:value-type="float" office:value="31.5" calcext:value-type="float">
            <text:p>31.5</text:p>
          </table:table-cell>
          <table:table-cell office:value-type="float" office:value="31.05" calcext:value-type="float">
            <text:p>31.05</text:p>
          </table:table-cell>
          <table:table-cell office:value-type="string" calcext:value-type="string">
            <text:p>0.05%</text:p>
          </table:table-cell>
          <table:table-cell office:value-type="float" office:value="24.19" calcext:value-type="float">
            <text:p>24.19</text:p>
          </table:table-cell>
          <table:table-cell office:value-type="string" calcext:value-type="string">
            <text:p>77.9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acchiatto</text:p>
          </table:table-cell>
          <table:table-cell office:value-type="float" office:value="2111253000278" calcext:value-type="float">
            <text:p>2111253000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926" calcext:value-type="float">
            <text:p>99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2%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80.4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cha</text:p>
          </table:table-cell>
          <table:table-cell office:value-type="float" office:value="2111253000285" calcext:value-type="float">
            <text:p>211125300028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9908" calcext:value-type="float">
            <text:p>999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string" calcext:value-type="string">
            <text:p>0.02%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82.48%</text:p>
          </table:table-cell>
          <table:table-cell/>
          <table:table-cell table:style-name="ce2"/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ocha</text:p>
          </table:table-cell>
          <table:table-cell office:value-type="float" office:value="2111253000285" calcext:value-type="float">
            <text:p>211125300028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909" calcext:value-type="float">
            <text:p>99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2%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80.46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2111253000285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9027" calcext:value-type="float">
            <text:p>9990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2%</text:p>
          </table:table-cell>
          <table:table-cell office:value-type="float" office:value="159.5" calcext:value-type="float">
            <text:p>159.5</text:p>
          </table:table-cell>
          <table:table-cell office:value-type="float" office:value="158.75" calcext:value-type="float">
            <text:p>158.75</text:p>
          </table:table-cell>
          <table:table-cell office:value-type="string" calcext:value-type="string">
            <text:p>0.25%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81.48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2111253000285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676" calcext:value-type="float">
            <text:p>996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office:value-type="float" office:value="69.5" calcext:value-type="float">
            <text:p>69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0%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79.68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2111253000285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472" calcext:value-type="float">
            <text:p>9984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61%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7%</text:p>
          </table:table-cell>
          <table:table-cell office:value-type="float" office:value="251.2" calcext:value-type="float">
            <text:p>251.2</text:p>
          </table:table-cell>
          <table:table-cell office:value-type="string" calcext:value-type="string">
            <text:p>83.18%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2111253000285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461" calcext:value-type="float">
            <text:p>994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%</text:p>
          </table:table-cell>
          <table:table-cell office:value-type="float" office:value="98.5" calcext:value-type="float">
            <text:p>98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0.15%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82.71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iccolo Latte</text:p>
          </table:table-cell>
          <table:table-cell office:value-type="float" office:value="2111253000292" calcext:value-type="float">
            <text:p>2111253000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98956" calcext:value-type="float">
            <text:p>9989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1%</text:p>
          </table:table-cell>
          <table:table-cell office:value-type="float" office:value="92" calcext:value-type="float">
            <text:p>92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0.14%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78.59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Piccolo Latte</text:p>
          </table:table-cell>
          <table:table-cell office:value-type="float" office:value="2111253000292" calcext:value-type="float">
            <text:p>2111253000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645" calcext:value-type="float">
            <text:p>96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office:value-type="float" office:value="37" calcext:value-type="float">
            <text:p>37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0.06%</text:p>
          </table:table-cell>
          <table:table-cell office:value-type="float" office:value="28.26" calcext:value-type="float">
            <text:p>28.26</text:p>
          </table:table-cell>
          <table:table-cell office:value-type="string" calcext:value-type="string">
            <text:p>78.28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outh American Coffee Beans (Brazilian / Columbian) (Per 10g)</text:p>
          </table:table-cell>
          <table:table-cell office:value-type="float" office:value="2111253000308" calcext:value-type="float">
            <text:p>2111253000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ulk Coffee</text:p>
          </table:table-cell>
          <table:table-cell office:value-type="float" office:value="994814" calcext:value-type="float">
            <text:p>9948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6%</text:p>
          </table:table-cell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0.02%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outh American Coffee Beans (Brazilian / Columbian) (Per 10g)</text:p>
          </table:table-cell>
          <table:table-cell office:value-type="float" office:value="2111253000308" calcext:value-type="float">
            <text:p>2111253000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ulk Coffee</text:p>
          </table:table-cell>
          <table:table-cell office:value-type="float" office:value="3717" calcext:value-type="float">
            <text:p>37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29%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.13%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rilla Press - Sunset Juice</text:p>
          </table:table-cell>
          <table:table-cell office:value-type="float" office:value="2111253000315" calcext:value-type="float">
            <text:p>2111253000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RILLA PRESS JUIC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8%</text:p>
          </table:table-cell>
          <table:table-cell office:value-type="float" office:value="200" calcext:value-type="float">
            <text:p>200</text:p>
          </table:table-cell>
          <table:table-cell office:value-type="float" office:value="197.6" calcext:value-type="float">
            <text:p>197.6</text:p>
          </table:table-cell>
          <table:table-cell office:value-type="string" calcext:value-type="string">
            <text:p>0.31%</text:p>
          </table:table-cell>
          <table:table-cell office:value-type="float" office:value="197.6" calcext:value-type="float">
            <text:p>197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rilla Press - Orange Juice</text:p>
          </table:table-cell>
          <table:table-cell office:value-type="float" office:value="2111253000339" calcext:value-type="float">
            <text:p>2111253000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RILLA PRESS JUIC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3%</text:p>
          </table:table-cell>
          <table:table-cell office:value-type="float" office:value="246" calcext:value-type="float">
            <text:p>246</text:p>
          </table:table-cell>
          <table:table-cell office:value-type="float" office:value="245.4" calcext:value-type="float">
            <text:p>245.4</text:p>
          </table:table-cell>
          <table:table-cell office:value-type="string" calcext:value-type="string">
            <text:p>0.38%</text:p>
          </table:table-cell>
          <table:table-cell office:value-type="float" office:value="245.4" calcext:value-type="float">
            <text:p>245.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vo + Egg</text:p>
          </table:table-cell>
          <table:table-cell office:value-type="float" office:value="2111253000377" calcext:value-type="float">
            <text:p>21112530003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8371" calcext:value-type="float">
            <text:p>9837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80%</text:p>
          </table:table-cell>
          <table:table-cell office:value-type="float" office:value="1477.5" calcext:value-type="float">
            <text:p>1477.5</text:p>
          </table:table-cell>
          <table:table-cell office:value-type="float" office:value="1378.5" calcext:value-type="float">
            <text:p>1378.5</text:p>
          </table:table-cell>
          <table:table-cell office:value-type="string" calcext:value-type="string">
            <text:p>2.13%</text:p>
          </table:table-cell>
          <table:table-cell office:value-type="float" office:value="1036.3" calcext:value-type="float">
            <text:p>1036.3</text:p>
          </table:table-cell>
          <table:table-cell office:value-type="string" calcext:value-type="string">
            <text:p>75.18%</text:p>
          </table:table-cell>
          <table:table-cell/>
          <table:table-cell table:style-name="ce2"/>
          <table:table-cell office:value-type="float" office:value="53.7" calcext:value-type="float">
            <text:p>5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vo + Egg</text:p>
          </table:table-cell>
          <table:table-cell office:value-type="float" office:value="2111253000377" calcext:value-type="float">
            <text:p>21112530003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642" calcext:value-type="float">
            <text:p>76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72%</text:p>
          </table:table-cell>
          <table:table-cell office:value-type="float" office:value="582" calcext:value-type="float">
            <text:p>582</text:p>
          </table:table-cell>
          <table:table-cell office:value-type="float" office:value="503.7" calcext:value-type="float">
            <text:p>503.7</text:p>
          </table:table-cell>
          <table:table-cell office:value-type="string" calcext:value-type="string">
            <text:p>0.78%</text:p>
          </table:table-cell>
          <table:table-cell office:value-type="float" office:value="367.4" calcext:value-type="float">
            <text:p>367.4</text:p>
          </table:table-cell>
          <table:table-cell office:value-type="string" calcext:value-type="string">
            <text:p>72.94%</text:p>
          </table:table-cell>
          <table:table-cell/>
          <table:table-cell table:style-name="ce2"/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vo + Egg</text:p>
          </table:table-cell>
          <table:table-cell office:value-type="string" calcext:value-type="string">
            <text:p>2111253000377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333" calcext:value-type="float">
            <text:p>99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64%</text:p>
          </table:table-cell>
          <table:table-cell office:value-type="float" office:value="909" calcext:value-type="float">
            <text:p>909</text:p>
          </table:table-cell>
          <table:table-cell office:value-type="float" office:value="864.6" calcext:value-type="float">
            <text:p>864.6</text:p>
          </table:table-cell>
          <table:table-cell office:value-type="string" calcext:value-type="string">
            <text:p>1.34%</text:p>
          </table:table-cell>
          <table:table-cell office:value-type="float" office:value="620.58" calcext:value-type="float">
            <text:p>620.58</text:p>
          </table:table-cell>
          <table:table-cell office:value-type="string" calcext:value-type="string">
            <text:p>71.78%</text:p>
          </table:table-cell>
          <table:table-cell/>
          <table:table-cell table:style-name="ce2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vo + Egg</text:p>
          </table:table-cell>
          <table:table-cell office:value-type="string" calcext:value-type="string">
            <text:p>2111253000377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885" calcext:value-type="float">
            <text:p>78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%</text:p>
          </table:table-cell>
          <table:table-cell office:value-type="float" office:value="331.5" calcext:value-type="float">
            <text:p>331.5</text:p>
          </table:table-cell>
          <table:table-cell office:value-type="float" office:value="323.1" calcext:value-type="float">
            <text:p>323.1</text:p>
          </table:table-cell>
          <table:table-cell office:value-type="string" calcext:value-type="string">
            <text:p>0.50%</text:p>
          </table:table-cell>
          <table:table-cell office:value-type="float" office:value="235.95" calcext:value-type="float">
            <text:p>235.95</text:p>
          </table:table-cell>
          <table:table-cell office:value-type="string" calcext:value-type="string">
            <text:p>73.03%</text:p>
          </table:table-cell>
          <table:table-cell/>
          <table:table-cell table:style-name="ce2"/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urnt Brussels Sprouts + Tahini Butter</text:p>
          </table:table-cell>
          <table:table-cell office:value-type="float" office:value="2111253000384" calcext:value-type="float">
            <text:p>21112530003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739" calcext:value-type="float">
            <text:p>997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2%</text:p>
          </table:table-cell>
          <table:table-cell office:value-type="float" office:value="373.5" calcext:value-type="float">
            <text:p>373.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51%</text:p>
          </table:table-cell>
          <table:table-cell office:value-type="float" office:value="276.56" calcext:value-type="float">
            <text:p>276.56</text:p>
          </table:table-cell>
          <table:table-cell office:value-type="string" calcext:value-type="string">
            <text:p>83.05%</text:p>
          </table:table-cell>
          <table:table-cell/>
          <table:table-cell table:style-name="ce2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urnt Brussels Sprouts + Tahini Butter</text:p>
          </table:table-cell>
          <table:table-cell office:value-type="float" office:value="2111253000384" calcext:value-type="float">
            <text:p>21112530003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office:value-type="float" office:value="129" calcext:value-type="float">
            <text:p>129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0.16%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80.18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urnt Brussels Sprouts + Tahini Butter</text:p>
          </table:table-cell>
          <table:table-cell office:value-type="string" calcext:value-type="string">
            <text:p>2111253000384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948" calcext:value-type="float">
            <text:p>99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.10%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84.14%</text:p>
          </table:table-cell>
          <table:table-cell/>
          <table:table-cell table:style-name="ce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urnt Brussels Sprouts + Tahini Butter</text:p>
          </table:table-cell>
          <table:table-cell office:value-type="string" calcext:value-type="string">
            <text:p>2111253000384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76.5" calcext:value-type="float">
            <text:p>7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0.09%</text:p>
          </table:table-cell>
          <table:table-cell office:value-type="float" office:value="45.18" calcext:value-type="float">
            <text:p>45.18</text:p>
          </table:table-cell>
          <table:table-cell office:value-type="string" calcext:value-type="string">
            <text:p>77.23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asted Eggplant + Miso Dressing</text:p>
          </table:table-cell>
          <table:table-cell office:value-type="float" office:value="2111253000391" calcext:value-type="float">
            <text:p>21112530003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973" calcext:value-type="float">
            <text:p>999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2%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33%</text:p>
          </table:table-cell>
          <table:table-cell office:value-type="float" office:value="184.76" calcext:value-type="float">
            <text:p>184.76</text:p>
          </table:table-cell>
          <table:table-cell office:value-type="string" calcext:value-type="string">
            <text:p>85.93%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asted Eggplant + Miso Dressing</text:p>
          </table:table-cell>
          <table:table-cell office:value-type="float" office:value="2111253000391" calcext:value-type="float">
            <text:p>21112530003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%</text:p>
          </table:table-cell>
          <table:table-cell office:value-type="float" office:value="139" calcext:value-type="float">
            <text:p>139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0.19%</text:p>
          </table:table-cell>
          <table:table-cell office:value-type="float" office:value="103.78" calcext:value-type="float">
            <text:p>103.78</text:p>
          </table:table-cell>
          <table:table-cell office:value-type="string" calcext:value-type="string">
            <text:p>84.72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asted Eggplant + Miso Dressing</text:p>
          </table:table-cell>
          <table:table-cell office:value-type="string" calcext:value-type="string">
            <text:p>2111253000391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992" calcext:value-type="float">
            <text:p>99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115.5" calcext:value-type="float">
            <text:p>115.5</text:p>
          </table:table-cell>
          <table:table-cell office:value-type="string" calcext:value-type="string">
            <text:p>0.18%</text:p>
          </table:table-cell>
          <table:table-cell office:value-type="float" office:value="98.22" calcext:value-type="float">
            <text:p>98.22</text:p>
          </table:table-cell>
          <table:table-cell office:value-type="string" calcext:value-type="string">
            <text:p>85.04%</text:p>
          </table:table-cell>
          <table:table-cell/>
          <table:table-cell table:style-name="ce2"/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asted Eggplant + Miso Dressing</text:p>
          </table:table-cell>
          <table:table-cell office:value-type="string" calcext:value-type="string">
            <text:p>2111253000391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07%</text:p>
          </table:table-cell>
          <table:table-cell office:value-type="float" office:value="42.24" calcext:value-type="float">
            <text:p>42.24</text:p>
          </table:table-cell>
          <table:table-cell office:value-type="string" calcext:value-type="string">
            <text:p>88.00%</text:p>
          </table:table-cell>
          <table:table-cell/>
          <table:table-cell table:style-name="ce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asted Mushrooms + Creme Fraiche</text:p>
          </table:table-cell>
          <table:table-cell office:value-type="float" office:value="2111253000407" calcext:value-type="float">
            <text:p>21112530004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799" calcext:value-type="float">
            <text:p>997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9%</text:p>
          </table:table-cell>
          <table:table-cell office:value-type="float" office:value="560.5" calcext:value-type="float">
            <text:p>560.5</text:p>
          </table:table-cell>
          <table:table-cell office:value-type="float" office:value="522.5" calcext:value-type="float">
            <text:p>522.5</text:p>
          </table:table-cell>
          <table:table-cell office:value-type="string" calcext:value-type="string">
            <text:p>0.81%</text:p>
          </table:table-cell>
          <table:table-cell office:value-type="float" office:value="407.06" calcext:value-type="float">
            <text:p>407.06</text:p>
          </table:table-cell>
          <table:table-cell office:value-type="string" calcext:value-type="string">
            <text:p>77.91%</text:p>
          </table:table-cell>
          <table:table-cell/>
          <table:table-cell table:style-name="ce2"/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asted Mushrooms + Creme Fraiche</text:p>
          </table:table-cell>
          <table:table-cell office:value-type="float" office:value="2111253000407" calcext:value-type="float">
            <text:p>21112530004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24" calcext:value-type="float">
            <text:p>7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3%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44%</text:p>
          </table:table-cell>
          <table:table-cell office:value-type="float" office:value="221.84" calcext:value-type="float">
            <text:p>221.84</text:p>
          </table:table-cell>
          <table:table-cell office:value-type="string" calcext:value-type="string">
            <text:p>78.11%</text:p>
          </table:table-cell>
          <table:table-cell/>
          <table:table-cell table:style-name="ce2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asted Mushrooms + Creme Fraiche</text:p>
          </table:table-cell>
          <table:table-cell office:value-type="string" calcext:value-type="string">
            <text:p>2111253000407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932" calcext:value-type="float">
            <text:p>999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%</text:p>
          </table:table-cell>
          <table:table-cell office:value-type="float" office:value="292.5" calcext:value-type="float">
            <text:p>292.5</text:p>
          </table:table-cell>
          <table:table-cell office:value-type="float" office:value="288.9" calcext:value-type="float">
            <text:p>288.9</text:p>
          </table:table-cell>
          <table:table-cell office:value-type="string" calcext:value-type="string">
            <text:p>0.45%</text:p>
          </table:table-cell>
          <table:table-cell office:value-type="float" office:value="217.86" calcext:value-type="float">
            <text:p>217.86</text:p>
          </table:table-cell>
          <table:table-cell office:value-type="string" calcext:value-type="string">
            <text:p>75.41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asted Mushrooms + Creme Fraiche</text:p>
          </table:table-cell>
          <table:table-cell office:value-type="string" calcext:value-type="string">
            <text:p>2111253000407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17%</text:p>
          </table:table-cell>
          <table:table-cell office:value-type="float" office:value="202.5" calcext:value-type="float">
            <text:p>202.5</text:p>
          </table:table-cell>
          <table:table-cell office:value-type="float" office:value="190.09" calcext:value-type="float">
            <text:p>190.09</text:p>
          </table:table-cell>
          <table:table-cell office:value-type="string" calcext:value-type="string">
            <text:p>0.29%</text:p>
          </table:table-cell>
          <table:table-cell office:value-type="float" office:value="141.25" calcext:value-type="float">
            <text:p>141.25</text:p>
          </table:table-cell>
          <table:table-cell office:value-type="string" calcext:value-type="string">
            <text:p>74.31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moked Salmon + Cream Cheese</text:p>
          </table:table-cell>
          <table:table-cell office:value-type="float" office:value="2111253000414" calcext:value-type="float">
            <text:p>21112530004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16%</text:p>
          </table:table-cell>
          <table:table-cell office:value-type="float" office:value="1111.5" calcext:value-type="float">
            <text:p>1111.5</text:p>
          </table:table-cell>
          <table:table-cell office:value-type="float" office:value="1049.75" calcext:value-type="float">
            <text:p>1049.75</text:p>
          </table:table-cell>
          <table:table-cell office:value-type="string" calcext:value-type="string">
            <text:p>1.62%</text:p>
          </table:table-cell>
          <table:table-cell office:value-type="float" office:value="777.67" calcext:value-type="float">
            <text:p>777.67</text:p>
          </table:table-cell>
          <table:table-cell office:value-type="string" calcext:value-type="string">
            <text:p>74.08%</text:p>
          </table:table-cell>
          <table:table-cell/>
          <table:table-cell table:style-name="ce2"/>
          <table:table-cell office:value-type="float" office:value="103.35" calcext:value-type="float">
            <text:p>10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moked Salmon + Cream Cheese</text:p>
          </table:table-cell>
          <table:table-cell office:value-type="float" office:value="2111253000414" calcext:value-type="float">
            <text:p>21112530004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40%</text:p>
          </table:table-cell>
          <table:table-cell office:value-type="float" office:value="341" calcext:value-type="float">
            <text:p>34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9%</text:p>
          </table:table-cell>
          <table:table-cell office:value-type="float" office:value="221.92" calcext:value-type="float">
            <text:p>221.92</text:p>
          </table:table-cell>
          <table:table-cell office:value-type="string" calcext:value-type="string">
            <text:p>70.45%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moked Salmon + Cream Cheese</text:p>
          </table:table-cell>
          <table:table-cell office:value-type="string" calcext:value-type="string">
            <text:p>2111253000414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835" calcext:value-type="float">
            <text:p>8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8%</text:p>
          </table:table-cell>
          <table:table-cell office:value-type="float" office:value="607.5" calcext:value-type="float">
            <text:p>607.5</text:p>
          </table:table-cell>
          <table:table-cell office:value-type="float" office:value="590.95" calcext:value-type="float">
            <text:p>590.95</text:p>
          </table:table-cell>
          <table:table-cell office:value-type="string" calcext:value-type="string">
            <text:p>0.91%</text:p>
          </table:table-cell>
          <table:table-cell office:value-type="float" office:value="411.95" calcext:value-type="float">
            <text:p>411.95</text:p>
          </table:table-cell>
          <table:table-cell office:value-type="string" calcext:value-type="string">
            <text:p>69.71%</text:p>
          </table:table-cell>
          <table:table-cell/>
          <table:table-cell table:style-name="ce2"/>
          <table:table-cell office:value-type="float" office:value="32.05" calcext:value-type="float">
            <text:p>3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moked Salmon + Cream Cheese</text:p>
          </table:table-cell>
          <table:table-cell office:value-type="string" calcext:value-type="string">
            <text:p>2111253000414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115" calcext:value-type="float">
            <text:p>115</text:p>
          </table:table-cell>
          <table:table-cell office:value-type="float" office:value="105.8" calcext:value-type="float">
            <text:p>105.8</text:p>
          </table:table-cell>
          <table:table-cell office:value-type="string" calcext:value-type="string">
            <text:p>0.16%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6.16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oasted Banana + Peanut Butter</text:p>
          </table:table-cell>
          <table:table-cell office:value-type="float" office:value="2111253000421" calcext:value-type="float">
            <text:p>211125300042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476" calcext:value-type="float">
            <text:p>994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8%</text:p>
          </table:table-cell>
          <table:table-cell office:value-type="float" office:value="502" calcext:value-type="float">
            <text:p>502</text:p>
          </table:table-cell>
          <table:table-cell office:value-type="float" office:value="398.7" calcext:value-type="float">
            <text:p>398.7</text:p>
          </table:table-cell>
          <table:table-cell office:value-type="string" calcext:value-type="string">
            <text:p>0.62%</text:p>
          </table:table-cell>
          <table:table-cell office:value-type="float" office:value="321.18" calcext:value-type="float">
            <text:p>321.18</text:p>
          </table:table-cell>
          <table:table-cell office:value-type="string" calcext:value-type="string">
            <text:p>80.56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oasted Banana + Peanut Butter</text:p>
          </table:table-cell>
          <table:table-cell office:value-type="float" office:value="2111253000421" calcext:value-type="float">
            <text:p>211125300042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7%</text:p>
          </table:table-cell>
          <table:table-cell office:value-type="float" office:value="166.5" calcext:value-type="float">
            <text:p>166.5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0.23%</text:p>
          </table:table-cell>
          <table:table-cell office:value-type="float" office:value="120.24" calcext:value-type="float">
            <text:p>120.24</text:p>
          </table:table-cell>
          <table:table-cell office:value-type="string" calcext:value-type="string">
            <text:p>81.46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oasted Banana + Peanut Butter</text:p>
          </table:table-cell>
          <table:table-cell office:value-type="string" calcext:value-type="string">
            <text:p>2111253000421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848" calcext:value-type="float">
            <text:p>998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0.35%</text:p>
          </table:table-cell>
          <table:table-cell office:value-type="float" office:value="181.3" calcext:value-type="float">
            <text:p>181.3</text:p>
          </table:table-cell>
          <table:table-cell office:value-type="string" calcext:value-type="string">
            <text:p>80.94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oasted Banana + Peanut Butter</text:p>
          </table:table-cell>
          <table:table-cell office:value-type="string" calcext:value-type="string">
            <text:p>2111253000421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07%</text:p>
          </table:table-cell>
          <table:table-cell office:value-type="float" office:value="38.85" calcext:value-type="float">
            <text:p>38.85</text:p>
          </table:table-cell>
          <table:table-cell office:value-type="string" calcext:value-type="string">
            <text:p>80.94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rench Sourdough Bread (Per Slice)</text:p>
          </table:table-cell>
          <table:table-cell office:value-type="float" office:value="2111253000438" calcext:value-type="float">
            <text:p>2111253000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0.05%</text:p>
          </table:table-cell>
          <table:table-cell office:value-type="float" office:value="26.78" calcext:value-type="float">
            <text:p>26.78</text:p>
          </table:table-cell>
          <table:table-cell office:value-type="string" calcext:value-type="string">
            <text:p>82.91%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luten Free Bread (Per Slice)</text:p>
          </table:table-cell>
          <table:table-cell office:value-type="float" office:value="2111253000445" calcext:value-type="float">
            <text:p>2111253000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0.03%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93.26%</text:p>
          </table:table-cell>
          <table:table-cell/>
          <table:table-cell table:style-name="ce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abyccino (For Kids)</text:p>
          </table:table-cell>
          <table:table-cell office:value-type="float" office:value="2111253000513" calcext:value-type="float">
            <text:p>2111253000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798" calcext:value-type="float">
            <text:p>9997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abyccino (For Kids)</text:p>
          </table:table-cell>
          <table:table-cell office:value-type="float" office:value="2111253000513" calcext:value-type="float">
            <text:p>2111253000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35" calcext:value-type="float">
            <text:p>99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elgian Hot Chocolate</text:p>
          </table:table-cell>
          <table:table-cell office:value-type="float" office:value="2111253000520" calcext:value-type="float">
            <text:p>21112530005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743" calcext:value-type="float">
            <text:p>999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%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78.5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elgian Hot Chocolate</text:p>
          </table:table-cell>
          <table:table-cell office:value-type="float" office:value="2111253000520" calcext:value-type="float">
            <text:p>21112530005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36" calcext:value-type="float">
            <text:p>99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8.5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elgian Hot Chocolate</text:p>
          </table:table-cell>
          <table:table-cell office:value-type="string" calcext:value-type="string">
            <text:p>2111253000520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103" calcext:value-type="float">
            <text:p>9991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0%</text:p>
          </table:table-cell>
          <table:table-cell office:value-type="float" office:value="265" calcext:value-type="float">
            <text:p>265</text:p>
          </table:table-cell>
          <table:table-cell office:value-type="float" office:value="264.2" calcext:value-type="float">
            <text:p>264.2</text:p>
          </table:table-cell>
          <table:table-cell office:value-type="string" calcext:value-type="string">
            <text:p>0.41%</text:p>
          </table:table-cell>
          <table:table-cell office:value-type="float" office:value="208.1" calcext:value-type="float">
            <text:p>208.1</text:p>
          </table:table-cell>
          <table:table-cell office:value-type="string" calcext:value-type="string">
            <text:p>78.77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elgian Hot Chocolate</text:p>
          </table:table-cell>
          <table:table-cell office:value-type="string" calcext:value-type="string">
            <text:p>2111253000520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286" calcext:value-type="float">
            <text:p>999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5%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28%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80.8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elgian Hot Chocolate</text:p>
          </table:table-cell>
          <table:table-cell office:value-type="string" calcext:value-type="string">
            <text:p>2111253000520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716" calcext:value-type="float">
            <text:p>997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office:value-type="float" office:value="48" calcext:value-type="float">
            <text:p>48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0.07%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80.6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hamomile Lavender Latte</text:p>
          </table:table-cell>
          <table:table-cell office:value-type="float" office:value="2111253000537" calcext:value-type="float">
            <text:p>2111253000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0.17%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78.7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hamomile Lavender Latte</text:p>
          </table:table-cell>
          <table:table-cell office:value-type="string" calcext:value-type="string">
            <text:p>2111253000537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78.8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lden Turmeric Latte</text:p>
          </table:table-cell>
          <table:table-cell office:value-type="float" office:value="2111253000544" calcext:value-type="float">
            <text:p>211125300054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727" calcext:value-type="float">
            <text:p>9997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table:number-columns-repeated="2" office:value-type="float" office:value="33.5" calcext:value-type="float">
            <text:p>33.5</text:p>
          </table:table-cell>
          <table:table-cell office:value-type="string" calcext:value-type="string">
            <text:p>0.05%</text:p>
          </table:table-cell>
          <table:table-cell office:value-type="float" office:value="28.45" calcext:value-type="float">
            <text:p>28.45</text:p>
          </table:table-cell>
          <table:table-cell office:value-type="string" calcext:value-type="string">
            <text:p>84.93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Golden Turmeric Latte</text:p>
          </table:table-cell>
          <table:table-cell office:value-type="float" office:value="2111253000544" calcext:value-type="float">
            <text:p>211125300054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79" calcext:value-type="float">
            <text:p>99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string" calcext:value-type="string">
            <text:p>0.03%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85.22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lden Turmeric Latte</text:p>
          </table:table-cell>
          <table:table-cell office:value-type="string" calcext:value-type="string">
            <text:p>2111253000544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241" calcext:value-type="float">
            <text:p>9992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%</text:p>
          </table:table-cell>
          <table:table-cell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0.18%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83.61%</text:p>
          </table:table-cell>
          <table:table-cell/>
          <table:table-cell table:style-name="ce2"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Golden Turmeric Latte</text:p>
          </table:table-cell>
          <table:table-cell office:value-type="string" calcext:value-type="string">
            <text:p>2111253000544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795" calcext:value-type="float">
            <text:p>99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0.07%</text:p>
          </table:table-cell>
          <table:table-cell office:value-type="float" office:value="38.56" calcext:value-type="float">
            <text:p>38.56</text:p>
          </table:table-cell>
          <table:table-cell office:value-type="string" calcext:value-type="string">
            <text:p>83.83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lden Turmeric Latte</text:p>
          </table:table-cell>
          <table:table-cell office:value-type="string" calcext:value-type="string">
            <text:p>2111253000544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784" calcext:value-type="float">
            <text:p>9997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.09%</text:p>
          </table:table-cell>
          <table:table-cell office:value-type="float" office:value="49.93" calcext:value-type="float">
            <text:p>49.93</text:p>
          </table:table-cell>
          <table:table-cell office:value-type="string" calcext:value-type="string">
            <text:p>87.60%</text:p>
          </table:table-cell>
          <table:table-cell/>
          <table:table-cell table:style-name="ce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Golden Turmeric Latte</text:p>
          </table:table-cell>
          <table:table-cell office:value-type="string" calcext:value-type="string">
            <text:p>2111253000544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65" calcext:value-type="float">
            <text:p>998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85.9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mond &amp; Cashew Nut Milk</text:p>
          </table:table-cell>
          <table:table-cell office:value-type="string" calcext:value-type="string">
            <text:p>2111253000551-5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2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1.2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memade Lemonade</text:p>
          </table:table-cell>
          <table:table-cell office:value-type="float" office:value="2111253000568" calcext:value-type="float">
            <text:p>2111253000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183" calcext:value-type="float">
            <text:p>91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02%</text:p>
          </table:table-cell>
          <table:table-cell office:value-type="float" office:value="402" calcext:value-type="float">
            <text:p>402</text:p>
          </table:table-cell>
          <table:table-cell office:value-type="float" office:value="398.4" calcext:value-type="float">
            <text:p>398.4</text:p>
          </table:table-cell>
          <table:table-cell office:value-type="string" calcext:value-type="string">
            <text:p>0.62%</text:p>
          </table:table-cell>
          <table:table-cell office:value-type="float" office:value="398.4" calcext:value-type="float">
            <text:p>398.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omemade Lemonade</text:p>
          </table:table-cell>
          <table:table-cell office:value-type="float" office:value="2111253000568" calcext:value-type="float">
            <text:p>2111253000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760" calcext:value-type="float">
            <text:p>97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%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.16%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cadamia, Almond &amp; Date Nut Milk</text:p>
          </table:table-cell>
          <table:table-cell office:value-type="float" office:value="2111253000575" calcext:value-type="float">
            <text:p>211125300057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8.5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cadamia, Almond &amp; Date Nut Milk</text:p>
          </table:table-cell>
          <table:table-cell office:value-type="string" calcext:value-type="string">
            <text:p>2111253000575-4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2%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78.7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cadamia, Almond &amp; Date Nut Milk</text:p>
          </table:table-cell>
          <table:table-cell office:value-type="string" calcext:value-type="string">
            <text:p>2111253000575-5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8.7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tcha Latte</text:p>
          </table:table-cell>
          <table:table-cell office:value-type="float" office:value="2111253000582" calcext:value-type="float">
            <text:p>211125300058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%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0.13%</text:p>
          </table:table-cell>
          <table:table-cell office:value-type="float" office:value="73.87" calcext:value-type="float">
            <text:p>73.87</text:p>
          </table:table-cell>
          <table:table-cell office:value-type="string" calcext:value-type="string">
            <text:p>84.91%</text:p>
          </table:table-cell>
          <table:table-cell/>
          <table:table-cell table:style-name="ce2"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atcha Latte</text:p>
          </table:table-cell>
          <table:table-cell office:value-type="float" office:value="2111253000582" calcext:value-type="float">
            <text:p>211125300058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33" calcext:value-type="float">
            <text:p>99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33.94" calcext:value-type="float">
            <text:p>33.94</text:p>
          </table:table-cell>
          <table:table-cell office:value-type="string" calcext:value-type="string">
            <text:p>84.85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tcha Latte</text:p>
          </table:table-cell>
          <table:table-cell office:value-type="string" calcext:value-type="string">
            <text:p>2111253000582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253" calcext:value-type="float">
            <text:p>9982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5%</text:p>
          </table:table-cell>
          <table:table-cell office:value-type="float" office:value="276.5" calcext:value-type="float">
            <text:p>276.5</text:p>
          </table:table-cell>
          <table:table-cell office:value-type="float" office:value="267.75" calcext:value-type="float">
            <text:p>267.75</text:p>
          </table:table-cell>
          <table:table-cell office:value-type="string" calcext:value-type="string">
            <text:p>0.41%</text:p>
          </table:table-cell>
          <table:table-cell office:value-type="float" office:value="223.11" calcext:value-type="float">
            <text:p>223.11</text:p>
          </table:table-cell>
          <table:table-cell office:value-type="string" calcext:value-type="string">
            <text:p>83.33%</text:p>
          </table:table-cell>
          <table:table-cell/>
          <table:table-cell table:style-name="ce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atcha Latte</text:p>
          </table:table-cell>
          <table:table-cell office:value-type="string" calcext:value-type="string">
            <text:p>2111253000582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867" calcext:value-type="float">
            <text:p>98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%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15%</text:p>
          </table:table-cell>
          <table:table-cell office:value-type="float" office:value="79.88" calcext:value-type="float">
            <text:p>79.88</text:p>
          </table:table-cell>
          <table:table-cell office:value-type="string" calcext:value-type="string">
            <text:p>83.2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tcha Latte</text:p>
          </table:table-cell>
          <table:table-cell office:value-type="string" calcext:value-type="string">
            <text:p>2111253000582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6815" calcext:value-type="float">
            <text:p>9968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05%</text:p>
          </table:table-cell>
          <table:table-cell office:value-type="float" office:value="537" calcext:value-type="float">
            <text:p>537</text:p>
          </table:table-cell>
          <table:table-cell office:value-type="float" office:value="531.55" calcext:value-type="float">
            <text:p>531.55</text:p>
          </table:table-cell>
          <table:table-cell office:value-type="string" calcext:value-type="string">
            <text:p>0.82%</text:p>
          </table:table-cell>
          <table:table-cell office:value-type="float" office:value="461.86" calcext:value-type="float">
            <text:p>461.86</text:p>
          </table:table-cell>
          <table:table-cell office:value-type="string" calcext:value-type="string">
            <text:p>86.89%</text:p>
          </table:table-cell>
          <table:table-cell/>
          <table:table-cell table:style-name="ce2"/>
          <table:table-cell office:value-type="float" office:value="19.3" calcext:value-type="float">
            <text:p>1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atcha Latte</text:p>
          </table:table-cell>
          <table:table-cell office:value-type="string" calcext:value-type="string">
            <text:p>2111253000582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641" calcext:value-type="float">
            <text:p>96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6%</text:p>
          </table:table-cell>
          <table:table-cell office:value-type="float" office:value="285.5" calcext:value-type="float">
            <text:p>285.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44%</text:p>
          </table:table-cell>
          <table:table-cell office:value-type="float" office:value="246.63" calcext:value-type="float">
            <text:p>246.63</text:p>
          </table:table-cell>
          <table:table-cell office:value-type="string" calcext:value-type="string">
            <text:p>86.84%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se &amp; Earl Grey Latte</text:p>
          </table:table-cell>
          <table:table-cell office:value-type="float" office:value="2111253000599" calcext:value-type="float">
            <text:p>2111253000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7%</text:p>
          </table:table-cell>
          <table:table-cell office:value-type="float" office:value="249" calcext:value-type="float">
            <text:p>249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.38%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78.7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se &amp; Earl Grey Latte</text:p>
          </table:table-cell>
          <table:table-cell office:value-type="float" office:value="2111253000599" calcext:value-type="float">
            <text:p>2111253000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.15%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78.97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ose &amp; Earl Grey Latte</text:p>
          </table:table-cell>
          <table:table-cell office:value-type="string" calcext:value-type="string">
            <text:p>2111253000599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%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0.21%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78.8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ose &amp; Earl Grey Latte</text:p>
          </table:table-cell>
          <table:table-cell office:value-type="string" calcext:value-type="string">
            <text:p>2111253000599-1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.10%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78.8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iced Chai Latte</text:p>
          </table:table-cell>
          <table:table-cell office:value-type="float" office:value="2111253000605" calcext:value-type="float">
            <text:p>211125300060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523" calcext:value-type="float">
            <text:p>9995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table:number-columns-repeated="2" office:value-type="float" office:value="59.5" calcext:value-type="float">
            <text:p>59.5</text:p>
          </table:table-cell>
          <table:table-cell office:value-type="string" calcext:value-type="string">
            <text:p>0.09%</text:p>
          </table:table-cell>
          <table:table-cell office:value-type="float" office:value="50.41" calcext:value-type="float">
            <text:p>50.41</text:p>
          </table:table-cell>
          <table:table-cell office:value-type="string" calcext:value-type="string">
            <text:p>84.72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piced Chai Latte</text:p>
          </table:table-cell>
          <table:table-cell office:value-type="float" office:value="2111253000605" calcext:value-type="float">
            <text:p>211125300060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86.53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iced Chai Latte</text:p>
          </table:table-cell>
          <table:table-cell office:value-type="string" calcext:value-type="string">
            <text:p>2111253000605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460" calcext:value-type="float">
            <text:p>998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%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35%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83.61%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piced Chai Latte</text:p>
          </table:table-cell>
          <table:table-cell office:value-type="string" calcext:value-type="string">
            <text:p>2111253000605-1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757" calcext:value-type="float">
            <text:p>7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.14%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83.83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iced Chai Latte</text:p>
          </table:table-cell>
          <table:table-cell office:value-type="string" calcext:value-type="string">
            <text:p>2111253000605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9185" calcext:value-type="float">
            <text:p>999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5%</text:p>
          </table:table-cell>
          <table:table-cell office:value-type="float" office:value="175.5" calcext:value-type="float">
            <text:p>175.5</text:p>
          </table:table-cell>
          <table:table-cell office:value-type="float" office:value="174.75" calcext:value-type="float">
            <text:p>174.75</text:p>
          </table:table-cell>
          <table:table-cell office:value-type="string" calcext:value-type="string">
            <text:p>0.27%</text:p>
          </table:table-cell>
          <table:table-cell office:value-type="float" office:value="151.52" calcext:value-type="float">
            <text:p>151.52</text:p>
          </table:table-cell>
          <table:table-cell office:value-type="string" calcext:value-type="string">
            <text:p>86.71%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piced Chai Latte</text:p>
          </table:table-cell>
          <table:table-cell office:value-type="string" calcext:value-type="string">
            <text:p>2111253000605-2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%</text:p>
          </table:table-cell>
          <table:table-cell office:value-type="float" office:value="70" calcext:value-type="float">
            <text:p>70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0.11%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85.2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erry Berry Good Smoothie Bowl</text:p>
          </table:table-cell>
          <table:table-cell office:value-type="float" office:value="2111253000612" calcext:value-type="float">
            <text:p>2111253000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92%</text:p>
          </table:table-cell>
          <table:table-cell office:value-type="float" office:value="923.5" calcext:value-type="float">
            <text:p>923.5</text:p>
          </table:table-cell>
          <table:table-cell office:value-type="float" office:value="890.5" calcext:value-type="float">
            <text:p>890.5</text:p>
          </table:table-cell>
          <table:table-cell office:value-type="string" calcext:value-type="string">
            <text:p>1.38%</text:p>
          </table:table-cell>
          <table:table-cell office:value-type="float" office:value="890.5" calcext:value-type="float">
            <text:p>890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23.5" calcext:value-type="float">
            <text:p>2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erry Berry Good Smoothie Bowl</text:p>
          </table:table-cell>
          <table:table-cell office:value-type="float" office:value="2111253000612" calcext:value-type="float">
            <text:p>2111253000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1%</text:p>
          </table:table-cell>
          <table:table-cell office:value-type="float" office:value="300" calcext:value-type="float">
            <text:p>300</text:p>
          </table:table-cell>
          <table:table-cell office:value-type="float" office:value="292.92" calcext:value-type="float">
            <text:p>292.92</text:p>
          </table:table-cell>
          <table:table-cell office:value-type="string" calcext:value-type="string">
            <text:p>0.45%</text:p>
          </table:table-cell>
          <table:table-cell office:value-type="float" office:value="292.92" calcext:value-type="float">
            <text:p>292.9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ink Flamingo Smoothie Bowl</text:p>
          </table:table-cell>
          <table:table-cell office:value-type="float" office:value="2111253000629" calcext:value-type="float">
            <text:p>21112530006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4%</text:p>
          </table:table-cell>
          <table:table-cell office:value-type="float" office:value="377" calcext:value-type="float">
            <text:p>37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50%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Pink Flamingo Smoothie Bowl</text:p>
          </table:table-cell>
          <table:table-cell office:value-type="float" office:value="2111253000629" calcext:value-type="float">
            <text:p>21112530006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%</text:p>
          </table:table-cell>
          <table:table-cell office:value-type="float" office:value="143" calcext:value-type="float">
            <text:p>143</text:p>
          </table:table-cell>
          <table:table-cell office:value-type="float" office:value="126.1" calcext:value-type="float">
            <text:p>126.1</text:p>
          </table:table-cell>
          <table:table-cell office:value-type="string" calcext:value-type="string">
            <text:p>0.19%</text:p>
          </table:table-cell>
          <table:table-cell office:value-type="float" office:value="126.1" calcext:value-type="float">
            <text:p>126.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Hulk Smoothie Bowl</text:p>
          </table:table-cell>
          <table:table-cell office:value-type="float" office:value="2111253000636" calcext:value-type="float">
            <text:p>2111253000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%</text:p>
          </table:table-cell>
          <table:table-cell office:value-type="float" office:value="151.5" calcext:value-type="float">
            <text:p>151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0.19%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he Hulk Smoothie Bowl</text:p>
          </table:table-cell>
          <table:table-cell office:value-type="float" office:value="2111253000636" calcext:value-type="float">
            <text:p>2111253000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%</text:p>
          </table:table-cell>
          <table:table-cell office:value-type="float" office:value="165" calcext:value-type="float">
            <text:p>165</text:p>
          </table:table-cell>
          <table:table-cell office:value-type="float" office:value="93.41" calcext:value-type="float">
            <text:p>93.41</text:p>
          </table:table-cell>
          <table:table-cell office:value-type="string" calcext:value-type="string">
            <text:p>0.14%</text:p>
          </table:table-cell>
          <table:table-cell office:value-type="float" office:value="93.41" calcext:value-type="float">
            <text:p>93.4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ough Nut Smoothie Bowl</text:p>
          </table:table-cell>
          <table:table-cell office:value-type="float" office:value="2111253000643" calcext:value-type="float">
            <text:p>21112530006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82%</text:p>
          </table:table-cell>
          <table:table-cell office:value-type="float" office:value="707" calcext:value-type="float">
            <text:p>70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1.05%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ough Nut Smoothie Bowl</text:p>
          </table:table-cell>
          <table:table-cell office:value-type="float" office:value="2111253000643" calcext:value-type="float">
            <text:p>21112530006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%</text:p>
          </table:table-cell>
          <table:table-cell office:value-type="float" office:value="195" calcext:value-type="float">
            <text:p>195</text:p>
          </table:table-cell>
          <table:table-cell office:value-type="float" office:value="154.7" calcext:value-type="float">
            <text:p>154.7</text:p>
          </table:table-cell>
          <table:table-cell office:value-type="string" calcext:value-type="string">
            <text:p>0.24%</text:p>
          </table:table-cell>
          <table:table-cell office:value-type="float" office:value="154.7" calcext:value-type="float">
            <text:p>154.7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ropicana Smoothie Bowl</text:p>
          </table:table-cell>
          <table:table-cell office:value-type="float" office:value="2111253000650" calcext:value-type="float">
            <text:p>2111253000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7%</text:p>
          </table:table-cell>
          <table:table-cell office:value-type="float" office:value="465" calcext:value-type="float">
            <text:p>465</text:p>
          </table:table-cell>
          <table:table-cell office:value-type="float" office:value="283.5" calcext:value-type="float">
            <text:p>283.5</text:p>
          </table:table-cell>
          <table:table-cell office:value-type="string" calcext:value-type="string">
            <text:p>0.44%</text:p>
          </table:table-cell>
          <table:table-cell office:value-type="float" office:value="283.5" calcext:value-type="float">
            <text:p>283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ropicana Smoothie Bowl</text:p>
          </table:table-cell>
          <table:table-cell office:value-type="float" office:value="2111253000650" calcext:value-type="float">
            <text:p>2111253000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16%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hamomile Tea (caffeine-free)</text:p>
          </table:table-cell>
          <table:table-cell office:value-type="float" office:value="2111253000667" calcext:value-type="float">
            <text:p>2111253000667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476" calcext:value-type="float">
            <text:p>9994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%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0.18%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hamomile Tea (caffeine-free)</text:p>
          </table:table-cell>
          <table:table-cell office:value-type="string" calcext:value-type="string">
            <text:p>2111253000667-1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874" calcext:value-type="float">
            <text:p>999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4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5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old Brew Iced Tea</text:p>
          </table:table-cell>
          <table:table-cell office:value-type="float" office:value="2111253000681" calcext:value-type="float">
            <text:p>2111253000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8198" calcext:value-type="float">
            <text:p>998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82%</text:p>
          </table:table-cell>
          <table:table-cell office:value-type="float" office:value="324" calcext:value-type="float">
            <text:p>324</text:p>
          </table:table-cell>
          <table:table-cell office:value-type="float" office:value="323.4" calcext:value-type="float">
            <text:p>323.4</text:p>
          </table:table-cell>
          <table:table-cell office:value-type="string" calcext:value-type="string">
            <text:p>0.50%</text:p>
          </table:table-cell>
          <table:table-cell office:value-type="float" office:value="215.4" calcext:value-type="float">
            <text:p>215.4</text:p>
          </table:table-cell>
          <table:table-cell office:value-type="string" calcext:value-type="string">
            <text:p>66.6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old Brew Iced Tea</text:p>
          </table:table-cell>
          <table:table-cell office:value-type="float" office:value="2111253000681" calcext:value-type="float">
            <text:p>2111253000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759" calcext:value-type="float">
            <text:p>97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1%</text:p>
          </table:table-cell>
          <table:table-cell office:value-type="float" office:value="120" calcext:value-type="float">
            <text:p>120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0.18%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66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Earl Grey Tea</text:p>
          </table:table-cell>
          <table:table-cell office:value-type="float" office:value="2111253000698" calcext:value-type="float">
            <text:p>2111253000698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386" calcext:value-type="float">
            <text:p>9993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7%</text:p>
          </table:table-cell>
          <table:table-cell office:value-type="float" office:value="127" calcext:value-type="float">
            <text:p>127</text:p>
          </table:table-cell>
          <table:table-cell office:value-type="float" office:value="124.2" calcext:value-type="float">
            <text:p>124.2</text:p>
          </table:table-cell>
          <table:table-cell office:value-type="string" calcext:value-type="string">
            <text:p>0.19%</text:p>
          </table:table-cell>
          <table:table-cell office:value-type="float" office:value="124.2" calcext:value-type="float">
            <text:p>124.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Earl Grey Tea</text:p>
          </table:table-cell>
          <table:table-cell office:value-type="float" office:value="2111253000698" calcext:value-type="float">
            <text:p>2111253000698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873" calcext:value-type="float">
            <text:p>9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Earl Grey Tea</text:p>
          </table:table-cell>
          <table:table-cell office:value-type="string" calcext:value-type="string">
            <text:p>2111253000698-2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864" calcext:value-type="float">
            <text:p>9998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60" calcext:value-type="float">
            <text:p>60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0.09%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57.4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Earl Grey Tea</text:p>
          </table:table-cell>
          <table:table-cell office:value-type="string" calcext:value-type="string">
            <text:p>2111253000698-2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88" calcext:value-type="float">
            <text:p>99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2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8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Organic Lemongrass Tea (Caffeine-Free)</text:p>
          </table:table-cell>
          <table:table-cell office:value-type="float" office:value="2111253000728" calcext:value-type="float">
            <text:p>2111253000728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194" calcext:value-type="float">
            <text:p>9991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2%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0.23%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Organic Lemongrass Tea (Caffeine-Free)</text:p>
          </table:table-cell>
          <table:table-cell office:value-type="float" office:value="2111253000728" calcext:value-type="float">
            <text:p>2111253000728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office:value-type="float" office:value="63" calcext:value-type="float">
            <text:p>63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0.09%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Organic Lemongrass Tea (Caffeine-Free)</text:p>
          </table:table-cell>
          <table:table-cell office:value-type="string" calcext:value-type="string">
            <text:p>2111253000728-2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796" calcext:value-type="float">
            <text:p>999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60" calcext:value-type="float">
            <text:p>60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0.09%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56.6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Organic Lemongrass Tea (Caffeine-Free)</text:p>
          </table:table-cell>
          <table:table-cell office:value-type="string" calcext:value-type="string">
            <text:p>2111253000728-2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8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ieves Tea (Vangedi Pekoe)</text:p>
          </table:table-cell>
          <table:table-cell office:value-type="float" office:value="2111253000773" calcext:value-type="float">
            <text:p>2111253000773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.06%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ieves Tea (Vangedi Pekoe)</text:p>
          </table:table-cell>
          <table:table-cell office:value-type="string" calcext:value-type="string">
            <text:p>2111253000773-2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4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01151322425" calcext:value-type="float">
            <text:p>2201151322425</text:p>
          </table:table-cell>
          <table:table-cell office:value-type="string" calcext:value-type="string">
            <text:p>ABC Roundu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0.03%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46.3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01151322425" calcext:value-type="float">
            <text:p>2201151322425</text:p>
          </table:table-cell>
          <table:table-cell office:value-type="string" calcext:value-type="string">
            <text:p>ABC Roundu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7.8" calcext:value-type="float">
            <text:p>37.8</text:p>
          </table:table-cell>
          <table:table-cell office:value-type="string" calcext:value-type="string">
            <text:p>0.06%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46.3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01151324412" calcext:value-type="float">
            <text:p>2201151324412</text:p>
          </table:table-cell>
          <table:table-cell office:value-type="string" calcext:value-type="string">
            <text:p>World Ma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7.8" calcext:value-type="float">
            <text:p>37.8</text:p>
          </table:table-cell>
          <table:table-cell office:value-type="string" calcext:value-type="string">
            <text:p>0.06%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46.3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201151325464" calcext:value-type="float">
            <text:p>2201151325464</text:p>
          </table:table-cell>
          <table:table-cell office:value-type="string" calcext:value-type="string">
            <text:p>Dinosa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table:number-columns-repeated="2" office:value-type="float" office:value="59.5" calcext:value-type="float">
            <text:p>59.5</text:p>
          </table:table-cell>
          <table:table-cell office:value-type="string" calcext:value-type="string">
            <text:p>0.09%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46.0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201151328212" calcext:value-type="float">
            <text:p>220115132821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string" calcext:value-type="string">
            <text:p>0.02%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46.0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201151329578" calcext:value-type="float">
            <text:p>2201151329578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table:number-columns-repeated="2" office:value-type="float" office:value="59.5" calcext:value-type="float">
            <text:p>59.5</text:p>
          </table:table-cell>
          <table:table-cell office:value-type="string" calcext:value-type="string">
            <text:p>0.09%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46.0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201151330475" calcext:value-type="float">
            <text:p>2201151330475</text:p>
          </table:table-cell>
          <table:table-cell office:value-type="string" calcext:value-type="string">
            <text:p>Fox Tale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string" calcext:value-type="string">
            <text:p>0.02%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46.0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use of Diamonds - Headband</text:p>
          </table:table-cell>
          <table:table-cell office:value-type="float" office:value="2201151423023" calcext:value-type="float">
            <text:p>2201151423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 of Diamond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16%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31.18%</text:p>
          </table:table-cell>
          <table:table-cell/>
          <table:table-cell office:value-type="string" calcext:value-type="string">
            <text:p>House Of Diam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use of Diamonds - Scrunchie</text:p>
          </table:table-cell>
          <table:table-cell office:value-type="float" office:value="2201151423337" calcext:value-type="float">
            <text:p>2201151423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 of Diamond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4%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House Of Diam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ive Me A Hand - Card Deck</text:p>
          </table:table-cell>
          <table:table-cell office:value-type="float" office:value="2201151434418" calcext:value-type="float">
            <text:p>2201151434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ive Me A Han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0.07%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Will &amp; Wel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eco Reusable Bag</text:p>
          </table:table-cell>
          <table:table-cell office:value-type="float" office:value="2201151704252" calcext:value-type="float">
            <text:p>2201151704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119.7" calcext:value-type="float">
            <text:p>119.7</text:p>
          </table:table-cell>
          <table:table-cell office:value-type="string" calcext:value-type="string">
            <text:p>0.18%</text:p>
          </table:table-cell>
          <table:table-cell office:value-type="float" office:value="67.27" calcext:value-type="float">
            <text:p>67.27</text:p>
          </table:table-cell>
          <table:table-cell office:value-type="string" calcext:value-type="string">
            <text:p>56.20%</text:p>
          </table:table-cell>
          <table:table-cell/>
          <table:table-cell office:value-type="string" calcext:value-type="string">
            <text:p>Pec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Peco Reusable Bag</text:p>
          </table:table-cell>
          <table:table-cell office:value-type="float" office:value="2201151704252" calcext:value-type="float">
            <text:p>2201151704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9.9" calcext:value-type="float">
            <text:p>39.9</text:p>
          </table:table-cell>
          <table:table-cell office:value-type="string" calcext:value-type="string">
            <text:p>0.06%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57.89%</text:p>
          </table:table-cell>
          <table:table-cell/>
          <table:table-cell office:value-type="string" calcext:value-type="string">
            <text:p>Pec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Solid Cologne</text:p>
          </table:table-cell>
          <table:table-cell office:value-type="float" office:value="2201153000017" calcext:value-type="float">
            <text:p>2201153000017</text:p>
          </table:table-cell>
          <table:table-cell office:value-type="string" calcext:value-type="string">
            <text:p>Ambrosi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4%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Solid Cologne</text:p>
          </table:table-cell>
          <table:table-cell office:value-type="float" office:value="2201153000031" calcext:value-type="float">
            <text:p>2201153000031</text:p>
          </table:table-cell>
          <table:table-cell office:value-type="string" calcext:value-type="string">
            <text:p>Black Canyo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4%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Solid Cologne</text:p>
          </table:table-cell>
          <table:table-cell office:value-type="float" office:value="2201153000086" calcext:value-type="float">
            <text:p>2201153000086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Solid Cologne</text:p>
          </table:table-cell>
          <table:table-cell office:value-type="float" office:value="2201153000093" calcext:value-type="float">
            <text:p>2201153000093</text:p>
          </table:table-cell>
          <table:table-cell office:value-type="string" calcext:value-type="string">
            <text:p>Theo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4%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Natural Deodorant</text:p>
          </table:table-cell>
          <table:table-cell office:value-type="float" office:value="2201153000109" calcext:value-type="float">
            <text:p>2201153000109</text:p>
          </table:table-cell>
          <table:table-cell office:value-type="string" calcext:value-type="string">
            <text:p>Citronella &amp; Hone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4%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Natural Deodorant</text:p>
          </table:table-cell>
          <table:table-cell office:value-type="float" office:value="2201153000116" calcext:value-type="float">
            <text:p>2201153000116</text:p>
          </table:table-cell>
          <table:table-cell office:value-type="string" calcext:value-type="string">
            <text:p>Eucalyptus &amp; Aloe Ver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4%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Natural Deodorant</text:p>
          </table:table-cell>
          <table:table-cell office:value-type="float" office:value="2201153000123" calcext:value-type="float">
            <text:p>2201153000123</text:p>
          </table:table-cell>
          <table:table-cell office:value-type="string" calcext:value-type="string">
            <text:p>Rose &amp; Vanill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4%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omemade Lemonade (1-for-1)</text:p>
          </table:table-cell>
          <table:table-cell office:value-type="float" office:value="2201161315196" calcext:value-type="float">
            <text:p>2201161315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idden Items</text:p>
          </table:table-cell>
          <table:table-cell office:value-type="float" office:value="99916" calcext:value-type="float">
            <text:p>99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6" calcext:value-type="float">
            <text:p>6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0.01%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Jute Bag</text:p>
          </table:table-cell>
          <table:table-cell office:value-type="float" office:value="2201161728255" calcext:value-type="float">
            <text:p>2201161728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.33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Journal - Fabric Bound (B&amp;W)</text:p>
          </table:table-cell>
          <table:table-cell office:value-type="float" office:value="2201181547560" calcext:value-type="float">
            <text:p>22011815475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105.3" calcext:value-type="float">
            <text:p>105.3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0.16%</text:p>
          </table:table-cell>
          <table:table-cell office:value-type="float" office:value="33.36" calcext:value-type="float">
            <text:p>33.36</text:p>
          </table:table-cell>
          <table:table-cell office:value-type="string" calcext:value-type="string">
            <text:p>32.77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Journal - Fabric Bound (Japanese)</text:p>
          </table:table-cell>
          <table:table-cell office:value-type="float" office:value="2201181548444" calcext:value-type="float">
            <text:p>220118154844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0.2" calcext:value-type="float">
            <text:p>70.2</text:p>
          </table:table-cell>
          <table:table-cell office:value-type="string" calcext:value-type="string">
            <text:p>0.11%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35.01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x The Novel Encounter (TNE)</text:p>
          </table:table-cell>
          <table:table-cell office:value-type="float" office:value="2201181550430" calcext:value-type="float">
            <text:p>2201181550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41.75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ei's Own - Baby Bib</text:p>
          </table:table-cell>
          <table:table-cell office:value-type="float" office:value="2201181708053" calcext:value-type="float">
            <text:p>2201181708053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119.4" calcext:value-type="float">
            <text:p>119.4</text:p>
          </table:table-cell>
          <table:table-cell office:value-type="string" calcext:value-type="string">
            <text:p>0.18%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ei's Own - Baby Hooded Towel</text:p>
          </table:table-cell>
          <table:table-cell office:value-type="float" office:value="2201181710063" calcext:value-type="float">
            <text:p>2201181710063</text:p>
          </table:table-cell>
          <table:table-cell office:value-type="string" calcext:value-type="string">
            <text:p>Dinosa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i's Ow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9.9" calcext:value-type="float">
            <text:p>39.9</text:p>
          </table:table-cell>
          <table:table-cell office:value-type="string" calcext:value-type="string">
            <text:p>0.06%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ei's Own - Baby Hooded Towel</text:p>
          </table:table-cell>
          <table:table-cell office:value-type="float" office:value="2201181710377" calcext:value-type="float">
            <text:p>2201181710377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79.8" calcext:value-type="float">
            <text:p>79.8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0.11%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22.22%</text:p>
          </table:table-cell>
          <table:table-cell/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ei's Own - Baby Swaddle Blanket</text:p>
          </table:table-cell>
          <table:table-cell office:value-type="float" office:value="2201181712432" calcext:value-type="float">
            <text:p>2201181712432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i's Ow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59.8" calcext:value-type="float">
            <text:p>59.8</text:p>
          </table:table-cell>
          <table:table-cell office:value-type="string" calcext:value-type="string">
            <text:p>0.09%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Mei's Ow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Hemp Soap Bag</text:p>
          </table:table-cell>
          <table:table-cell office:value-type="float" office:value="2201181853074" calcext:value-type="float">
            <text:p>2201181853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24" calcext:value-type="float">
            <text:p>2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0.04%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88.42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Stainless Steel Straw (Regular)</text:p>
          </table:table-cell>
          <table:table-cell office:value-type="float" office:value="2201181904400" calcext:value-type="float">
            <text:p>2201181904400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0.00%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74.29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Stainless Steel Straw (Regular)</text:p>
          </table:table-cell>
          <table:table-cell office:value-type="float" office:value="2201181904578" calcext:value-type="float">
            <text:p>22011819045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0.01%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60.78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Brush Cleaner</text:p>
          </table:table-cell>
          <table:table-cell office:value-type="float" office:value="2201181905322" calcext:value-type="float">
            <text:p>220118190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0.01%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8.11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Cotton Straw Pouch</text:p>
          </table:table-cell>
          <table:table-cell office:value-type="float" office:value="2201181906428" calcext:value-type="float">
            <text:p>2201181906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%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79.00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Coconut Bowl</text:p>
          </table:table-cell>
          <table:table-cell office:value-type="float" office:value="2201181909108" calcext:value-type="float">
            <text:p>2201181909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36" calcext:value-type="float">
            <text:p>36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0.05%</text:p>
          </table:table-cell>
          <table:table-cell office:value-type="float" office:value="30.82" calcext:value-type="float">
            <text:p>30.82</text:p>
          </table:table-cell>
          <table:table-cell office:value-type="string" calcext:value-type="string">
            <text:p>91.13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Coconut Spoon</text:p>
          </table:table-cell>
          <table:table-cell office:value-type="float" office:value="2201181909504" calcext:value-type="float">
            <text:p>2201181909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office:value-type="float" office:value="36" calcext:value-type="float">
            <text:p>36</text:p>
          </table:table-cell>
          <table:table-cell office:value-type="float" office:value="35.18" calcext:value-type="float">
            <text:p>35.18</text:p>
          </table:table-cell>
          <table:table-cell office:value-type="string" calcext:value-type="string">
            <text:p>0.05%</text:p>
          </table:table-cell>
          <table:table-cell office:value-type="float" office:value="27.18" calcext:value-type="float">
            <text:p>27.18</text:p>
          </table:table-cell>
          <table:table-cell office:value-type="string" calcext:value-type="string">
            <text:p>77.26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Toast Ingredients</text:p>
          </table:table-cell>
          <table:table-cell office:value-type="string" calcext:value-type="string">
            <text:p>2201182059277-1</text:p>
          </table:table-cell>
          <table:table-cell office:value-type="string" calcext:value-type="string">
            <text:p>Hard Boiled Egg (1pc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942" calcext:value-type="float">
            <text:p>99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6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Toast Ingredients</text:p>
          </table:table-cell>
          <table:table-cell office:value-type="string" calcext:value-type="string">
            <text:p>2201182059277-4</text:p>
          </table:table-cell>
          <table:table-cell office:value-type="string" calcext:value-type="string">
            <text:p>Smoked Salmon (2 slices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979" calcext:value-type="float">
            <text:p>999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0.01%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5.56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Toast Ingredients</text:p>
          </table:table-cell>
          <table:table-cell office:value-type="string" calcext:value-type="string">
            <text:p>2201182059277-7</text:p>
          </table:table-cell>
          <table:table-cell office:value-type="string" calcext:value-type="string">
            <text:p>Gluten-Free Brea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982" calcext:value-type="float">
            <text:p>999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oast Ingredients (Add-On)</text:p>
          </table:table-cell>
          <table:table-cell office:value-type="string" calcext:value-type="string">
            <text:p>2201182059277-9</text:p>
          </table:table-cell>
          <table:table-cell office:value-type="string" calcext:value-type="string">
            <text:p>Scrambled Egg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70" calcext:value-type="float">
            <text:p>99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4.5" calcext:value-type="float">
            <text:p>4.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0.01%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75.3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oast Ingredients (Add-On)</text:p>
          </table:table-cell>
          <table:table-cell office:value-type="string" calcext:value-type="string">
            <text:p>2201182059277-9</text:p>
          </table:table-cell>
          <table:table-cell office:value-type="string" calcext:value-type="string">
            <text:p>Scrambled Egg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60" calcext:value-type="float">
            <text:p>99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7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Ice</text:p>
          </table:table-cell>
          <table:table-cell office:value-type="float" office:value="2201182100368" calcext:value-type="float">
            <text:p>2201182100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766.43" calcext:value-type="float">
            <text:p>999766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01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Milk Alternatives</text:p>
          </table:table-cell>
          <table:table-cell office:value-type="float" office:value="2201182102034" calcext:value-type="float">
            <text:p>22011821020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880" calcext:value-type="float">
            <text:p>999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dd Milk Alternatives</text:p>
          </table:table-cell>
          <table:table-cell office:value-type="float" office:value="2201182102034" calcext:value-type="float">
            <text:p>22011821020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85.45" calcext:value-type="float">
            <text:p>99985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Espresso Shot</text:p>
          </table:table-cell>
          <table:table-cell office:value-type="float" office:value="2201182115287" calcext:value-type="float">
            <text:p>22011821152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968.5" calcext:value-type="float">
            <text:p>99996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dd Smoothie Bowl Ingredients</text:p>
          </table:table-cell>
          <table:table-cell office:value-type="string" calcext:value-type="string">
            <text:p>2201182115546-4</text:p>
          </table:table-cell>
          <table:table-cell office:value-type="string" calcext:value-type="string">
            <text:p>Peanut Butt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81" calcext:value-type="float">
            <text:p>99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6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ehyphen - MusicCloth City Map</text:p>
          </table:table-cell>
          <table:table-cell office:value-type="float" office:value="2201191507349" calcext:value-type="float">
            <text:p>220119150734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ehyp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98" calcext:value-type="float">
            <text:p>98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0.11%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14.2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use of Diamonds - Kimono</text:p>
          </table:table-cell>
          <table:table-cell office:value-type="float" office:value="2201221114356" calcext:value-type="float">
            <text:p>2201221114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 of Diamon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54" calcext:value-type="float">
            <text:p>54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0.08%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House Of Diam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elivery App Surcharge</text:p>
          </table:table-cell>
          <table:table-cell office:value-type="float" office:value="2201301429219" calcext:value-type="float">
            <text:p>2201301429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5434.68" calcext:value-type="float">
            <text:p>995434.68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1.08%</text:p>
          </table:table-cell>
          <table:table-cell table:number-columns-repeated="2" office:value-type="float" office:value="70.8" calcext:value-type="float">
            <text:p>70.8</text:p>
          </table:table-cell>
          <table:table-cell office:value-type="string" calcext:value-type="string">
            <text:p>0.11%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02101041083" calcext:value-type="float">
            <text:p>2202101041083</text:p>
          </table:table-cell>
          <table:table-cell office:value-type="string" calcext:value-type="string">
            <text:p>Singapore Ma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75.6" calcext:value-type="float">
            <text:p>75.6</text:p>
          </table:table-cell>
          <table:table-cell office:value-type="string" calcext:value-type="string">
            <text:p>0.12%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46.3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02101041083" calcext:value-type="float">
            <text:p>2202101041083</text:p>
          </table:table-cell>
          <table:table-cell office:value-type="string" calcext:value-type="string">
            <text:p>Singapore Ma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0.03%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46.3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ixed Berries Friand</text:p>
          </table:table-cell>
          <table:table-cell office:value-type="float" office:value="2203261337146" calcext:value-type="float">
            <text:p>2203261337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0%</text:p>
          </table:table-cell>
          <table:table-cell office:value-type="float" office:value="148.5" calcext:value-type="float">
            <text:p>148.5</text:p>
          </table:table-cell>
          <table:table-cell office:value-type="float" office:value="144.9" calcext:value-type="float">
            <text:p>144.9</text:p>
          </table:table-cell>
          <table:table-cell office:value-type="string" calcext:value-type="string">
            <text:p>0.22%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54.4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ixed Berries Friand</text:p>
          </table:table-cell>
          <table:table-cell office:value-type="float" office:value="2203261337146" calcext:value-type="float">
            <text:p>2203261337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%</text:p>
          </table:table-cell>
          <table:table-cell office:value-type="float" office:value="99" calcext:value-type="float">
            <text:p>99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0.13%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46.2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ney Iced Lemon Tea</text:p>
          </table:table-cell>
          <table:table-cell office:value-type="float" office:value="2206061911530" calcext:value-type="float">
            <text:p>2206061911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97856" calcext:value-type="float">
            <text:p>9978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2%</text:p>
          </table:table-cell>
          <table:table-cell office:value-type="float" office:value="147" calcext:value-type="float">
            <text:p>147</text:p>
          </table:table-cell>
          <table:table-cell office:value-type="float" office:value="144.2" calcext:value-type="float">
            <text:p>144.2</text:p>
          </table:table-cell>
          <table:table-cell office:value-type="string" calcext:value-type="string">
            <text:p>0.22%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56.3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oney Iced Lemon Tea</text:p>
          </table:table-cell>
          <table:table-cell office:value-type="float" office:value="2206061911530" calcext:value-type="float">
            <text:p>2206061911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9165" calcext:value-type="float">
            <text:p>91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3%</text:p>
          </table:table-cell>
          <table:table-cell office:value-type="float" office:value="196" calcext:value-type="float">
            <text:p>196</text:p>
          </table:table-cell>
          <table:table-cell office:value-type="float" office:value="186.2" calcext:value-type="float">
            <text:p>186.2</text:p>
          </table:table-cell>
          <table:table-cell office:value-type="string" calcext:value-type="string">
            <text:p>0.29%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54.8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Large Dry Erase Markers (Set of 12)</text:p>
          </table:table-cell>
          <table:table-cell office:value-type="float" office:value="2206141723176" calcext:value-type="float">
            <text:p>2206141723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39.6" calcext:value-type="float">
            <text:p>39.6</text:p>
          </table:table-cell>
          <table:table-cell office:value-type="float" office:value="38.61" calcext:value-type="float">
            <text:p>38.61</text:p>
          </table:table-cell>
          <table:table-cell office:value-type="string" calcext:value-type="string">
            <text:p>0.06%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38.46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after's Studio - Mosquito Repellent Spray</text:p>
          </table:table-cell>
          <table:table-cell office:value-type="float" office:value="2206221617128" calcext:value-type="float">
            <text:p>2206221617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rafter's Stud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Natural Deodorant</text:p>
          </table:table-cell>
          <table:table-cell office:value-type="float" office:value="2207201054063" calcext:value-type="float">
            <text:p>2207201054063</text:p>
          </table:table-cell>
          <table:table-cell office:value-type="string" calcext:value-type="string">
            <text:p>Wild Lavend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4%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208121738293" calcext:value-type="float">
            <text:p>2208121738293</text:p>
          </table:table-cell>
          <table:table-cell office:value-type="string" calcext:value-type="string">
            <text:p>House Plan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48.4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Neuhabitat - Loofah Kitchen Sponge (3pc set)</text:p>
          </table:table-cell>
          <table:table-cell office:value-type="float" office:value="2208181238047" calcext:value-type="float">
            <text:p>22081812380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euhabit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string" calcext:value-type="string">
            <text:p>0.02%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1.71%</text:p>
          </table:table-cell>
          <table:table-cell/>
          <table:table-cell office:value-type="string" calcext:value-type="string">
            <text:p>Neuhabit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Handwoven Throw</text:p>
          </table:table-cell>
          <table:table-cell office:value-type="float" office:value="2209010942319" calcext:value-type="float">
            <text:p>2209010942319</text:p>
          </table:table-cell>
          <table:table-cell office:value-type="string" calcext:value-type="string">
            <text:p>Koh Kong (Green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17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eramic</text:p>
          </table:table-cell>
          <table:table-cell office:value-type="float" office:value="2209010943569" calcext:value-type="float">
            <text:p>2209010943569</text:p>
          </table:table-cell>
          <table:table-cell office:value-type="string" calcext:value-type="string">
            <text:p>Srey Ceramic Box (S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2.00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Nebuliser Diffuser</text:p>
          </table:table-cell>
          <table:table-cell office:value-type="float" office:value="2209141330504" calcext:value-type="float">
            <text:p>2209141330504</text:p>
          </table:table-cell>
          <table:table-cell office:value-type="string" calcext:value-type="string">
            <text:p>Charcoal Black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string" calcext:value-type="string">
            <text:p>0.10%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35.04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Nebuliser Diffuser</text:p>
          </table:table-cell>
          <table:table-cell office:value-type="float" office:value="2209141331129" calcext:value-type="float">
            <text:p>2209141331129</text:p>
          </table:table-cell>
          <table:table-cell office:value-type="string" calcext:value-type="string">
            <text:p>Lavender Quartz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string" calcext:value-type="string">
            <text:p>0.10%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35.04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Nebuliser Diffuser</text:p>
          </table:table-cell>
          <table:table-cell office:value-type="float" office:value="2209141331266" calcext:value-type="float">
            <text:p>2209141331266</text:p>
          </table:table-cell>
          <table:table-cell office:value-type="string" calcext:value-type="string">
            <text:p>Spanish Crimso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string" calcext:value-type="string">
            <text:p>0.10%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35.04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Nebuliser Diffuser</text:p>
          </table:table-cell>
          <table:table-cell office:value-type="float" office:value="2209141331457" calcext:value-type="float">
            <text:p>2209141331457</text:p>
          </table:table-cell>
          <table:table-cell office:value-type="string" calcext:value-type="string">
            <text:p>Light Woo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string" calcext:value-type="string">
            <text:p>0.10%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35.04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rambe - Mahjong Tile</text:p>
          </table:table-cell>
          <table:table-cell office:value-type="float" office:value="2209162235109" calcext:value-type="float">
            <text:p>22091622351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r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.11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rambe - Wave Coasters</text:p>
          </table:table-cell>
          <table:table-cell office:value-type="float" office:value="2209162235192" calcext:value-type="float">
            <text:p>2209162235192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ramb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7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rambe - Wave Coasters</text:p>
          </table:table-cell>
          <table:table-cell office:value-type="float" office:value="2209162235284" calcext:value-type="float">
            <text:p>220916223528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r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Night Before Christmas A3 Coloring Mat</text:p>
          </table:table-cell>
          <table:table-cell office:value-type="float" office:value="2209291127078" calcext:value-type="float">
            <text:p>22092911270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string" calcext:value-type="string">
            <text:p>0.13%</text:p>
          </table:table-cell>
          <table:table-cell office:value-type="float" office:value="35.28" calcext:value-type="float">
            <text:p>35.28</text:p>
          </table:table-cell>
          <table:table-cell office:value-type="string" calcext:value-type="string">
            <text:p>42.1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innamon Bread Pudding</text:p>
          </table:table-cell>
          <table:table-cell office:value-type="float" office:value="2210032119108" calcext:value-type="float">
            <text:p>2210032119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5%</text:p>
          </table:table-cell>
          <table:table-cell office:value-type="float" office:value="224" calcext:value-type="float">
            <text:p>224</text:p>
          </table:table-cell>
          <table:table-cell office:value-type="float" office:value="223.2" calcext:value-type="float">
            <text:p>223.2</text:p>
          </table:table-cell>
          <table:table-cell office:value-type="string" calcext:value-type="string">
            <text:p>0.34%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49.82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mo Sencha</text:p>
          </table:table-cell>
          <table:table-cell office:value-type="float" office:value="2210032246125" calcext:value-type="float">
            <text:p>2210032246125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331" calcext:value-type="float">
            <text:p>9993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%</text:p>
          </table:table-cell>
          <table:table-cell office:value-type="float" office:value="241" calcext:value-type="float">
            <text:p>241</text:p>
          </table:table-cell>
          <table:table-cell office:value-type="float" office:value="237.8" calcext:value-type="float">
            <text:p>237.8</text:p>
          </table:table-cell>
          <table:table-cell office:value-type="string" calcext:value-type="string">
            <text:p>0.37%</text:p>
          </table:table-cell>
          <table:table-cell office:value-type="float" office:value="237.8" calcext:value-type="float">
            <text:p>237.8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omo Sencha</text:p>
          </table:table-cell>
          <table:table-cell office:value-type="float" office:value="2210032246125" calcext:value-type="float">
            <text:p>2210032246125</text:p>
          </table:table-cell>
          <table:table-cell office:value-type="string" calcext:value-type="string">
            <text:p>Small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832" calcext:value-type="float">
            <text:p>99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mo Sencha</text:p>
          </table:table-cell>
          <table:table-cell office:value-type="string" calcext:value-type="string">
            <text:p>2210032246125-1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802" calcext:value-type="float">
            <text:p>999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70" calcext:value-type="float">
            <text:p>70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0.11%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omo Sencha</text:p>
          </table:table-cell>
          <table:table-cell office:value-type="string" calcext:value-type="string">
            <text:p>2210032246125-1</text:p>
          </table:table-cell>
          <table:table-cell office:value-type="string" calcext:value-type="string">
            <text:p>Large P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EA</text:p>
          </table:table-cell>
          <table:table-cell office:value-type="float" office:value="99965" calcext:value-type="float">
            <text:p>99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2210032311199" calcext:value-type="float">
            <text:p>2210032311199</text:p>
          </table:table-cell>
          <table:table-cell office:value-type="string" calcext:value-type="string">
            <text:p>Brown Sugar &amp; Fig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Butter Croissant</text:p>
          </table:table-cell>
          <table:table-cell office:value-type="float" office:value="2210040915570" calcext:value-type="float">
            <text:p>2210040915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3%</text:p>
          </table:table-cell>
          <table:table-cell office:value-type="float" office:value="140" calcext:value-type="float">
            <text:p>140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0.21%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mond Chocolate Croissant</text:p>
          </table:table-cell>
          <table:table-cell office:value-type="float" office:value="2210040917185" calcext:value-type="float">
            <text:p>22100409171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AKED GOOD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64%</text:p>
          </table:table-cell>
          <table:table-cell office:value-type="float" office:value="210" calcext:value-type="float">
            <text:p>210</text:p>
          </table:table-cell>
          <table:table-cell office:value-type="float" office:value="199.75" calcext:value-type="float">
            <text:p>199.75</text:p>
          </table:table-cell>
          <table:table-cell office:value-type="string" calcext:value-type="string">
            <text:p>0.31%</text:p>
          </table:table-cell>
          <table:table-cell office:value-type="float" office:value="199.75" calcext:value-type="float">
            <text:p>199.7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atte</text:p>
          </table:table-cell>
          <table:table-cell office:value-type="float" office:value="2210053000133" calcext:value-type="float">
            <text:p>2210053000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urpple Drinks</text:p>
          </table:table-cell>
          <table:table-cell office:value-type="float" office:value="9994" calcext:value-type="float">
            <text:p>9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6.5" calcext:value-type="float">
            <text:p>6.5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0.01%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88.21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Flat White</text:p>
          </table:table-cell>
          <table:table-cell office:value-type="float" office:value="2210053000140" calcext:value-type="float">
            <text:p>2210053000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urpple Drinks</text:p>
          </table:table-cell>
          <table:table-cell office:value-type="float" office:value="9991" calcext:value-type="float">
            <text:p>9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6.5" calcext:value-type="float">
            <text:p>6.5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0.01%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88.21%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auyunan - Large Ball Ornament</text:p>
          </table:table-cell>
          <table:table-cell office:value-type="float" office:value="2210191726087" calcext:value-type="float">
            <text:p>22101917260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auyunan Handicraf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07%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-25.00%</text:p>
          </table:table-cell>
          <table:table-cell/>
          <table:table-cell office:value-type="string" calcext:value-type="string">
            <text:p>Sauyunan Handicraft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2210201233253" calcext:value-type="float">
            <text:p>2210201233253</text:p>
          </table:table-cell>
          <table:table-cell office:value-type="string" calcext:value-type="string">
            <text:p>French Vanill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210281311438" calcext:value-type="float">
            <text:p>2210281311438</text:p>
          </table:table-cell>
          <table:table-cell office:value-type="string" calcext:value-type="string">
            <text:p>Turtely Awesome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48.4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211111515248" calcext:value-type="float">
            <text:p>2211111515248</text:p>
          </table:table-cell>
          <table:table-cell office:value-type="string" calcext:value-type="string">
            <text:p>Under the Se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0.03%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Journal - Fabric Bound (B&amp;W)</text:p>
          </table:table-cell>
          <table:table-cell office:value-type="float" office:value="2211121431507" calcext:value-type="float">
            <text:p>221112143150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0.09%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34.96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La Carte Ingredients</text:p>
          </table:table-cell>
          <table:table-cell office:value-type="float" office:value="2211131635407" calcext:value-type="float">
            <text:p>22111316354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35" calcext:value-type="float">
            <text:p>99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Lavender Geranium (Any 2 for $12)</text:p>
          </table:table-cell>
          <table:table-cell office:value-type="float" office:value="2301211411103" calcext:value-type="float">
            <text:p>23012114111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%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>-20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Mini Dry Erase Markers (Set of 10)</text:p>
          </table:table-cell>
          <table:table-cell office:value-type="float" office:value="2301271208323" calcext:value-type="float">
            <text:p>2301271208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table:number-columns-repeated="2" office:value-type="float" office:value="63.2" calcext:value-type="float">
            <text:p>63.2</text:p>
          </table:table-cell>
          <table:table-cell office:value-type="string" calcext:value-type="string">
            <text:p>0.10%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Mini Dry Erase Markers (Set of 10)</text:p>
          </table:table-cell>
          <table:table-cell office:value-type="float" office:value="2301271208323" calcext:value-type="float">
            <text:p>2301271208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0.02%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nkey Loot - Tableware</text:p>
          </table:table-cell>
          <table:table-cell office:value-type="float" office:value="2302221556334" calcext:value-type="float">
            <text:p>2302221556334</text:p>
          </table:table-cell>
          <table:table-cell office:value-type="string" calcext:value-type="string">
            <text:p>Chile Wooden Salt &amp; Pepper Contain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61.00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Work + Dine Day Pass</text:p>
          </table:table-cell>
          <table:table-cell office:value-type="float" office:value="2303281642340" calcext:value-type="float">
            <text:p>2303281642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845" calcext:value-type="float">
            <text:p>999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0.21%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lette Puzzles - Girls’ Trip</text:p>
          </table:table-cell>
          <table:table-cell office:value-type="float" office:value="2303302104482" calcext:value-type="float">
            <text:p>2303302104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64" calcext:value-type="float">
            <text:p>64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0.07%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.64%</text:p>
          </table:table-cell>
          <table:table-cell/>
          <table:table-cell office:value-type="string" calcext:value-type="string">
            <text:p>Palette Puzzl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Happy Mahjong</text:p>
          </table:table-cell>
          <table:table-cell office:value-type="float" office:value="2305161645014" calcext:value-type="float">
            <text:p>23051616450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0.07%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32.73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Happy Mahjong</text:p>
          </table:table-cell>
          <table:table-cell office:value-type="float" office:value="2305161645014" calcext:value-type="float">
            <text:p>23051616450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Happy Mahjong</text:p>
          </table:table-cell>
          <table:table-cell office:value-type="float" office:value="2305161645168" calcext:value-type="float">
            <text:p>23051616451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Local Breakfast</text:p>
          </table:table-cell>
          <table:table-cell office:value-type="float" office:value="2305161700539" calcext:value-type="float">
            <text:p>230516170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Local Breakfast</text:p>
          </table:table-cell>
          <table:table-cell office:value-type="float" office:value="2305161700539" calcext:value-type="float">
            <text:p>230516170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Local Breakfast</text:p>
          </table:table-cell>
          <table:table-cell office:value-type="float" office:value="2305161701154" calcext:value-type="float">
            <text:p>23051617011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Rooting For Trees</text:p>
          </table:table-cell>
          <table:table-cell office:value-type="float" office:value="2305161708528" calcext:value-type="float">
            <text:p>230516170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0.05%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31.55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Rooting For Trees</text:p>
          </table:table-cell>
          <table:table-cell office:value-type="float" office:value="2305161709181" calcext:value-type="float">
            <text:p>23051617091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ouse of Diamonds - Eyemask &amp; Scrunchie Set</text:p>
          </table:table-cell>
          <table:table-cell office:value-type="float" office:value="2305191218493" calcext:value-type="float">
            <text:p>23051912184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 of Diamond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0.17%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House Of Diam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erbed Roasted Chicken</text:p>
          </table:table-cell>
          <table:table-cell office:value-type="float" office:value="2305191851034" calcext:value-type="float">
            <text:p>23051918510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7%</text:p>
          </table:table-cell>
          <table:table-cell office:value-type="float" office:value="1880" calcext:value-type="float">
            <text:p>188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2.77%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erbed Roasted Chicken</text:p>
          </table:table-cell>
          <table:table-cell office:value-type="float" office:value="2305191851034" calcext:value-type="float">
            <text:p>23051918510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92%</text:p>
          </table:table-cell>
          <table:table-cell office:value-type="float" office:value="1254" calcext:value-type="float">
            <text:p>1254</text:p>
          </table:table-cell>
          <table:table-cell office:value-type="float" office:value="1197.6" calcext:value-type="float">
            <text:p>1197.6</text:p>
          </table:table-cell>
          <table:table-cell office:value-type="string" calcext:value-type="string">
            <text:p>1.85%</text:p>
          </table:table-cell>
          <table:table-cell office:value-type="float" office:value="1197.6" calcext:value-type="float">
            <text:p>1197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64.4" calcext:value-type="float">
            <text:p>16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ide of Mesclun Salad</text:p>
          </table:table-cell>
          <table:table-cell office:value-type="float" office:value="2305191911561" calcext:value-type="float">
            <text:p>2305191911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0.01%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crambled Egg Toast</text:p>
          </table:table-cell>
          <table:table-cell office:value-type="float" office:value="2305191912353" calcext:value-type="float">
            <text:p>230519191235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196" calcext:value-type="float">
            <text:p>991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3%</text:p>
          </table:table-cell>
          <table:table-cell office:value-type="float" office:value="659" calcext:value-type="float">
            <text:p>659</text:p>
          </table:table-cell>
          <table:table-cell office:value-type="float" office:value="538.5" calcext:value-type="float">
            <text:p>538.5</text:p>
          </table:table-cell>
          <table:table-cell office:value-type="string" calcext:value-type="string">
            <text:p>0.83%</text:p>
          </table:table-cell>
          <table:table-cell office:value-type="float" office:value="538.5" calcext:value-type="float">
            <text:p>538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crambled Egg Toast</text:p>
          </table:table-cell>
          <table:table-cell office:value-type="float" office:value="2305191912353" calcext:value-type="float">
            <text:p>230519191235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8%</text:p>
          </table:table-cell>
          <table:table-cell office:value-type="float" office:value="396" calcext:value-type="float">
            <text:p>39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.55%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crambled Egg Toast</text:p>
          </table:table-cell>
          <table:table-cell office:value-type="string" calcext:value-type="string">
            <text:p>2305191912353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99747" calcext:value-type="float">
            <text:p>997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%</text:p>
          </table:table-cell>
          <table:table-cell office:value-type="float" office:value="295.5" calcext:value-type="float">
            <text:p>295.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42%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6.6" calcext:value-type="float">
            <text:p>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Scrambled Egg Toast</text:p>
          </table:table-cell>
          <table:table-cell office:value-type="string" calcext:value-type="string">
            <text:p>2305191912353-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PEN-FACE TOAST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office:value-type="float" office:value="108" calcext:value-type="float">
            <text:p>108</text:p>
          </table:table-cell>
          <table:table-cell office:value-type="float" office:value="99.19" calcext:value-type="float">
            <text:p>99.19</text:p>
          </table:table-cell>
          <table:table-cell office:value-type="string" calcext:value-type="string">
            <text:p>0.15%</text:p>
          </table:table-cell>
          <table:table-cell office:value-type="float" office:value="99.19" calcext:value-type="float">
            <text:p>99.19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Big Breakfast</text:p>
          </table:table-cell>
          <table:table-cell office:value-type="float" office:value="2305191917082" calcext:value-type="float">
            <text:p>23051919170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998988" calcext:value-type="float">
            <text:p>9989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4%</text:p>
          </table:table-cell>
          <table:table-cell office:value-type="float" office:value="824" calcext:value-type="float">
            <text:p>824</text:p>
          </table:table-cell>
          <table:table-cell office:value-type="float" office:value="821.2" calcext:value-type="float">
            <text:p>821.2</text:p>
          </table:table-cell>
          <table:table-cell office:value-type="string" calcext:value-type="string">
            <text:p>1.27%</text:p>
          </table:table-cell>
          <table:table-cell office:value-type="float" office:value="821.2" calcext:value-type="float">
            <text:p>821.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SS Big Breakfast</text:p>
          </table:table-cell>
          <table:table-cell office:value-type="float" office:value="2305191917082" calcext:value-type="float">
            <text:p>23051919170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%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0.44%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Watermelon Coconut Slushie</text:p>
          </table:table-cell>
          <table:table-cell office:value-type="float" office:value="2305191918065" calcext:value-type="float">
            <text:p>23051919180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69%</text:p>
          </table:table-cell>
          <table:table-cell office:value-type="float" office:value="360" calcext:value-type="float">
            <text:p>360</text:p>
          </table:table-cell>
          <table:table-cell office:value-type="float" office:value="357.6" calcext:value-type="float">
            <text:p>357.6</text:p>
          </table:table-cell>
          <table:table-cell office:value-type="string" calcext:value-type="string">
            <text:p>0.55%</text:p>
          </table:table-cell>
          <table:table-cell office:value-type="float" office:value="357.6" calcext:value-type="float">
            <text:p>357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Watermelon Coconut Slushie</text:p>
          </table:table-cell>
          <table:table-cell office:value-type="float" office:value="2305191918065" calcext:value-type="float">
            <text:p>23051919180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%</text:p>
          </table:table-cell>
          <table:table-cell office:value-type="float" office:value="88" calcext:value-type="float">
            <text:p>88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0.13%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eamy Scrambled Eggs</text:p>
          </table:table-cell>
          <table:table-cell office:value-type="float" office:value="2305271027366" calcext:value-type="float">
            <text:p>2305271027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999630" calcext:value-type="float">
            <text:p>9996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3%</text:p>
          </table:table-cell>
          <table:table-cell office:value-type="float" office:value="168" calcext:value-type="float">
            <text:p>168</text:p>
          </table:table-cell>
          <table:table-cell office:value-type="float" office:value="164.4" calcext:value-type="float">
            <text:p>164.4</text:p>
          </table:table-cell>
          <table:table-cell office:value-type="string" calcext:value-type="string">
            <text:p>0.25%</text:p>
          </table:table-cell>
          <table:table-cell office:value-type="float" office:value="164.4" calcext:value-type="float">
            <text:p>164.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reamy Scrambled Eggs</text:p>
          </table:table-cell>
          <table:table-cell office:value-type="float" office:value="2305271027366" calcext:value-type="float">
            <text:p>2305271027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4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Mushroom for Love</text:p>
          </table:table-cell>
          <table:table-cell office:value-type="float" office:value="2305301007368" calcext:value-type="float">
            <text:p>23053010073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Mushroom for Love</text:p>
          </table:table-cell>
          <table:table-cell office:value-type="float" office:value="2305301019330" calcext:value-type="float">
            <text:p>2305301019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ure Coconut Water</text:p>
          </table:table-cell>
          <table:table-cell office:value-type="float" office:value="2306041659343" calcext:value-type="float">
            <text:p>2306041659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07%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5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Pure Coconut Water</text:p>
          </table:table-cell>
          <table:table-cell office:value-type="float" office:value="2306041659343" calcext:value-type="float">
            <text:p>2306041659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OUSE-MADE DRINK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office:value-type="float" office:value="42" calcext:value-type="float">
            <text:p>42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0.06%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73.4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lassic Tiramisu</text:p>
          </table:table-cell>
          <table:table-cell office:value-type="float" office:value="2306101436280" calcext:value-type="float">
            <text:p>2306101436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10%</text:p>
          </table:table-cell>
          <table:table-cell office:value-type="float" office:value="576" calcext:value-type="float">
            <text:p>576</text:p>
          </table:table-cell>
          <table:table-cell office:value-type="float" office:value="561.6" calcext:value-type="float">
            <text:p>561.6</text:p>
          </table:table-cell>
          <table:table-cell office:value-type="string" calcext:value-type="string">
            <text:p>0.87%</text:p>
          </table:table-cell>
          <table:table-cell office:value-type="float" office:value="561.6" calcext:value-type="float">
            <text:p>561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lassic Tiramisu</text:p>
          </table:table-cell>
          <table:table-cell office:value-type="float" office:value="2306101436280" calcext:value-type="float">
            <text:p>2306101436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2%</text:p>
          </table:table-cell>
          <table:table-cell office:value-type="float" office:value="168" calcext:value-type="float">
            <text:p>168</text:p>
          </table:table-cell>
          <table:table-cell office:value-type="float" office:value="161.6" calcext:value-type="float">
            <text:p>161.6</text:p>
          </table:table-cell>
          <table:table-cell office:value-type="string" calcext:value-type="string">
            <text:p>0.25%</text:p>
          </table:table-cell>
          <table:table-cell office:value-type="float" office:value="161.6" calcext:value-type="float">
            <text:p>161.6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306201601267" calcext:value-type="float">
            <text:p>2306201601267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3.8" calcext:value-type="float">
            <text:p>23.8</text:p>
          </table:table-cell>
          <table:table-cell office:value-type="string" calcext:value-type="string">
            <text:p>0.04%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cai Breeze Smoothie Bowl</text:p>
          </table:table-cell>
          <table:table-cell office:value-type="float" office:value="2306251637209" calcext:value-type="float">
            <text:p>2306251637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75%</text:p>
          </table:table-cell>
          <table:table-cell office:value-type="float" office:value="755.5" calcext:value-type="float">
            <text:p>755.5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1.07%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cai Breeze Smoothie Bowl</text:p>
          </table:table-cell>
          <table:table-cell office:value-type="float" office:value="2306251637209" calcext:value-type="float">
            <text:p>2306251637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MOOTHIE BOW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%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35%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ced Coconut Black</text:p>
          </table:table-cell>
          <table:table-cell office:value-type="float" office:value="2306251930010" calcext:value-type="float">
            <text:p>230625193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2%</text:p>
          </table:table-cell>
          <table:table-cell office:value-type="float" office:value="272" calcext:value-type="float">
            <text:p>272</text:p>
          </table:table-cell>
          <table:table-cell office:value-type="float" office:value="261.6" calcext:value-type="float">
            <text:p>261.6</text:p>
          </table:table-cell>
          <table:table-cell office:value-type="string" calcext:value-type="string">
            <text:p>0.40%</text:p>
          </table:table-cell>
          <table:table-cell office:value-type="float" office:value="159.6" calcext:value-type="float">
            <text:p>159.6</text:p>
          </table:table-cell>
          <table:table-cell office:value-type="string" calcext:value-type="string">
            <text:p>61.01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Iced Coconut Black</text:p>
          </table:table-cell>
          <table:table-cell office:value-type="float" office:value="2306251930010" calcext:value-type="float">
            <text:p>230625193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office:value-type="float" office:value="64" calcext:value-type="float">
            <text:p>64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0.10%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62.0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Forest Tea (Any 2 for $12)</text:p>
          </table:table-cell>
          <table:table-cell office:value-type="float" office:value="2308011720336" calcext:value-type="float">
            <text:p>2308011720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office:value-type="float" office:value="45.5" calcext:value-type="float">
            <text:p>45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6%</text:p>
          </table:table-cell>
          <table:table-cell office:value-type="float" office:value="-8.4" calcext:value-type="float">
            <text:p>-8.4</text:p>
          </table:table-cell>
          <table:table-cell office:value-type="string" calcext:value-type="string">
            <text:p>-20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Spiced Chai Pack</text:p>
          </table:table-cell>
          <table:table-cell office:value-type="float" office:value="2308241159012" calcext:value-type="float">
            <text:p>2308241159012</text:p>
          </table:table-cell>
          <table:table-cell office:value-type="string" calcext:value-type="string">
            <text:p>50g/2oz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1%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83.33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Turmeric Pack</text:p>
          </table:table-cell>
          <table:table-cell office:value-type="float" office:value="2308241201520" calcext:value-type="float">
            <text:p>2308241201520</text:p>
          </table:table-cell>
          <table:table-cell office:value-type="string" calcext:value-type="string">
            <text:p>50g/2oz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%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82.50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Almond Oat Cookies Jar</text:p>
          </table:table-cell>
          <table:table-cell office:value-type="float" office:value="2308241738156" calcext:value-type="float">
            <text:p>2308241738156</text:p>
          </table:table-cell>
          <table:table-cell office:value-type="string" calcext:value-type="string">
            <text:p>Big (8pcs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969" calcext:value-type="float">
            <text:p>9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%</text:p>
          </table:table-cell>
          <table:table-cell office:value-type="float" office:value="570" calcext:value-type="float">
            <text:p>57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79%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88.30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Awesome Durian</text:p>
          </table:table-cell>
          <table:table-cell office:value-type="float" office:value="2308292148577" calcext:value-type="float">
            <text:p>23082921485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Crabulous Chilli Crab</text:p>
          </table:table-cell>
          <table:table-cell office:value-type="float" office:value="2308292149116" calcext:value-type="float">
            <text:p>23082921491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Good Morning Athletic</text:p>
          </table:table-cell>
          <table:table-cell office:value-type="float" office:value="2308292149260" calcext:value-type="float">
            <text:p>23082921492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Oven-Baked Salmon</text:p>
          </table:table-cell>
          <table:table-cell office:value-type="float" office:value="2309271201313" calcext:value-type="float">
            <text:p>2309271201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.08%</text:p>
          </table:table-cell>
          <table:table-cell office:value-type="float" office:value="2952" calcext:value-type="float">
            <text:p>2952</text:p>
          </table:table-cell>
          <table:table-cell office:value-type="float" office:value="2799.3" calcext:value-type="float">
            <text:p>2799.3</text:p>
          </table:table-cell>
          <table:table-cell office:value-type="string" calcext:value-type="string">
            <text:p>4.33%</text:p>
          </table:table-cell>
          <table:table-cell office:value-type="float" office:value="2799.3" calcext:value-type="float">
            <text:p>2799.3</text:p>
          </table:table-cell>
          <table:table-cell office:value-type="string" calcext:value-type="string">
            <text:p>100.00%</text:p>
          </table:table-cell>
          <table:table-cell table:style-name="ce1" office:value-type="string" calcext:value-type="string">
            <text:p>The Social Space</text:p>
          </table:table-cell>
          <table:table-cell table:style-name="ce2"/>
          <table:table-cell office:value-type="float" office:value="346.4" calcext:value-type="float">
            <text:p>34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Oven-Baked Salmon</text:p>
          </table:table-cell>
          <table:table-cell office:value-type="float" office:value="2309271201313" calcext:value-type="float">
            <text:p>2309271201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14%</text:p>
          </table:table-cell>
          <table:table-cell office:value-type="float" office:value="1649" calcext:value-type="float">
            <text:p>1649</text:p>
          </table:table-cell>
          <table:table-cell office:value-type="float" office:value="1593.5" calcext:value-type="float">
            <text:p>1593.5</text:p>
          </table:table-cell>
          <table:table-cell office:value-type="string" calcext:value-type="string">
            <text:p>2.46%</text:p>
          </table:table-cell>
          <table:table-cell office:value-type="float" office:value="1593.5" calcext:value-type="float">
            <text:p>1593.5</text:p>
          </table:table-cell>
          <table:table-cell office:value-type="string" calcext:value-type="string">
            <text:p>100.00%</text:p>
          </table:table-cell>
          <table:table-cell table:style-name="ce1" office:value-type="string" calcext:value-type="string">
            <text:p>The Social Space</text:p>
          </table:table-cell>
          <table:table-cell table:style-name="ce2"/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Small)</text:p>
          </table:table-cell>
          <table:table-cell office:value-type="float" office:value="2310011105174" calcext:value-type="float">
            <text:p>2310011105174</text:p>
          </table:table-cell>
          <table:table-cell office:value-type="string" calcext:value-type="string">
            <text:p>Coffee &amp; Crea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wis &amp; Xavier - Solid Shampoo</text:p>
          </table:table-cell>
          <table:table-cell office:value-type="float" office:value="2311011729131" calcext:value-type="float">
            <text:p>2311011729131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wis &amp; Xavi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.07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4.55%</text:p>
          </table:table-cell>
          <table:table-cell/>
          <table:table-cell office:value-type="string" calcext:value-type="string">
            <text:p>Alwis &amp; Xav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Santa's Workshop A3 Coloring Mat</text:p>
          </table:table-cell>
          <table:table-cell office:value-type="float" office:value="2311041410238" calcext:value-type="float">
            <text:p>2311041410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55.8" calcext:value-type="float">
            <text:p>55.8</text:p>
          </table:table-cell>
          <table:table-cell office:value-type="string" calcext:value-type="string">
            <text:p>0.09%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42.15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Santa's Workshop A3 Coloring Mat</text:p>
          </table:table-cell>
          <table:table-cell office:value-type="float" office:value="2311041410238" calcext:value-type="float">
            <text:p>2311041410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string" calcext:value-type="string">
            <text:p>0.03%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26.3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rambe - Tray &amp; Coaster Set</text:p>
          </table:table-cell>
          <table:table-cell office:value-type="float" office:value="2311071608018" calcext:value-type="float">
            <text:p>2311071608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ramb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08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Kraft Wrapping Paper</text:p>
          </table:table-cell>
          <table:table-cell office:value-type="string" calcext:value-type="string">
            <text:p>2311091736036-1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Wrapping Pap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10.5" calcext:value-type="float">
            <text:p>10.5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0.02%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70.44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Desert Moon</text:p>
          </table:table-cell>
          <table:table-cell office:value-type="float" office:value="2311291024315" calcext:value-type="float">
            <text:p>2311291024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Bold Ram</text:p>
          </table:table-cell>
          <table:table-cell office:value-type="float" office:value="2311291026319" calcext:value-type="float">
            <text:p>2311291026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Beaming Rings</text:p>
          </table:table-cell>
          <table:table-cell office:value-type="float" office:value="2311291026449" calcext:value-type="float">
            <text:p>2311291026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Peaceful Dove</text:p>
          </table:table-cell>
          <table:table-cell office:value-type="float" office:value="2311291026487" calcext:value-type="float">
            <text:p>2311291026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54" calcext:value-type="float">
            <text:p>54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0.08%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37.93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Snow Leopard</text:p>
          </table:table-cell>
          <table:table-cell office:value-type="float" office:value="2311291027101" calcext:value-type="float">
            <text:p>231129102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Charming Songbird</text:p>
          </table:table-cell>
          <table:table-cell office:value-type="float" office:value="2311291027279" calcext:value-type="float">
            <text:p>23112910272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Noble Donkey</text:p>
          </table:table-cell>
          <table:table-cell office:value-type="float" office:value="2311291027361" calcext:value-type="float">
            <text:p>2311291027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ADE51 - Shooting Star</text:p>
          </table:table-cell>
          <table:table-cell office:value-type="float" office:value="2311291046577" calcext:value-type="float">
            <text:p>23112910465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.06%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MADE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Orange Oolong (Any 2 for $12)</text:p>
          </table:table-cell>
          <table:table-cell office:value-type="float" office:value="2312091110475" calcext:value-type="float">
            <text:p>23120911104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%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Fizz'O'Foam Starter Kit (6-scents)</text:p>
          </table:table-cell>
          <table:table-cell office:value-type="float" office:value="2312091139414" calcext:value-type="float">
            <text:p>2312091139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0.45%</text:p>
          </table:table-cell>
          <table:table-cell office:value-type="float" office:value="115.2" calcext:value-type="float">
            <text:p>115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Citrus Blooms (Any 2 for $12)</text:p>
          </table:table-cell>
          <table:table-cell office:value-type="float" office:value="2312091139483" calcext:value-type="float">
            <text:p>23120911394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office:value-type="float" office:value="45.5" calcext:value-type="float">
            <text:p>45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6%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Weird Pizza Athletic</text:p>
          </table:table-cell>
          <table:table-cell office:value-type="float" office:value="2312121004019" calcext:value-type="float">
            <text:p>2312121004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0.07%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32.73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Weird Pizza Athletic</text:p>
          </table:table-cell>
          <table:table-cell office:value-type="float" office:value="2312121006372" calcext:value-type="float">
            <text:p>231212100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0.05%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31.55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Tough Hedgehog</text:p>
          </table:table-cell>
          <table:table-cell office:value-type="float" office:value="2312121018337" calcext:value-type="float">
            <text:p>23121210183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after's Studio - Balm Box</text:p>
          </table:table-cell>
          <table:table-cell office:value-type="float" office:value="2401161047312" calcext:value-type="float">
            <text:p>2401161047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rafter's Studi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401251639335" calcext:value-type="float">
            <text:p>2401251639335</text:p>
          </table:table-cell>
          <table:table-cell office:value-type="string" calcext:value-type="string">
            <text:p>Sandstone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2%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17.82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izzicle Junboocha</text:p>
          </table:table-cell>
          <table:table-cell office:value-type="string" calcext:value-type="string">
            <text:p>2402071455365-1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IZZIC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%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.12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.7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Fizzicle Junboocha</text:p>
          </table:table-cell>
          <table:table-cell office:value-type="string" calcext:value-type="string">
            <text:p>2402071455365-2</text:p>
          </table:table-cell>
          <table:table-cell office:value-type="string" calcext:value-type="string">
            <text:p>Number 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IZZICL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%</text:p>
          </table:table-cell>
          <table:table-cell office:value-type="float" office:value="136" calcext:value-type="float">
            <text:p>136</text:p>
          </table:table-cell>
          <table:table-cell office:value-type="float" office:value="135.2" calcext:value-type="float">
            <text:p>135.2</text:p>
          </table:table-cell>
          <table:table-cell office:value-type="string" calcext:value-type="string">
            <text:p>0.21%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43.42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1</text:p>
          </table:table-cell>
          <table:table-cell office:value-type="string" calcext:value-type="string">
            <text:p>Strong Black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5%</text:p>
          </table:table-cell>
          <table:table-cell table:number-columns-repeated="2" office:value-type="float" office:value="149.5" calcext:value-type="float">
            <text:p>149.5</text:p>
          </table:table-cell>
          <table:table-cell office:value-type="string" calcext:value-type="string">
            <text:p>0.23%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53.8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1</text:p>
          </table:table-cell>
          <table:table-cell office:value-type="string" calcext:value-type="string">
            <text:p>Strong Black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24%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.16%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.85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40%</text:p>
          </table:table-cell>
          <table:table-cell office:value-type="float" office:value="182" calcext:value-type="float">
            <text:p>182</text:p>
          </table:table-cell>
          <table:table-cell office:value-type="float" office:value="173.6" calcext:value-type="float">
            <text:p>173.6</text:p>
          </table:table-cell>
          <table:table-cell office:value-type="string" calcext:value-type="string">
            <text:p>0.27%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40.0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.15%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86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3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40" calcext:value-type="float">
            <text:p>40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0.06%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36.22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old Brew Coffee</text:p>
          </table:table-cell>
          <table:table-cell office:value-type="string" calcext:value-type="string">
            <text:p>2402231928197-3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OFFE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4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7.5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3 Pack)</text:p>
          </table:table-cell>
          <table:table-cell office:value-type="float" office:value="2404041730229" calcext:value-type="float">
            <text:p>2404041730229</text:p>
          </table:table-cell>
          <table:table-cell office:value-type="string" calcext:value-type="string">
            <text:p>Lets Pla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119.6" calcext:value-type="float">
            <text:p>119.6</text:p>
          </table:table-cell>
          <table:table-cell office:value-type="float" office:value="116.61" calcext:value-type="float">
            <text:p>116.61</text:p>
          </table:table-cell>
          <table:table-cell office:value-type="string" calcext:value-type="string">
            <text:p>0.18%</text:p>
          </table:table-cell>
          <table:table-cell office:value-type="float" office:value="44.85" calcext:value-type="float">
            <text:p>44.85</text:p>
          </table:table-cell>
          <table:table-cell office:value-type="string" calcext:value-type="string">
            <text:p>38.46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low-Down Bagel Athletic</text:p>
          </table:table-cell>
          <table:table-cell office:value-type="float" office:value="2405141012475" calcext:value-type="float">
            <text:p>2405141012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low-Down Bagel Athletic</text:p>
          </table:table-cell>
          <table:table-cell office:value-type="float" office:value="2405141012543" calcext:value-type="float">
            <text:p>2405141012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2.93" calcext:value-type="float">
            <text:p>42.93</text:p>
          </table:table-cell>
          <table:table-cell office:value-type="string" calcext:value-type="string">
            <text:p>0.07%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406110948085" calcext:value-type="float">
            <text:p>2406110948085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0.03%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5</text:p>
          </table:table-cell>
          <table:table-cell office:value-type="float" office:value="2406110948184" calcext:value-type="float">
            <text:p>240611094818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string" calcext:value-type="string">
            <text:p>0.04%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SS Nasi Lemak</text:p>
          </table:table-cell>
          <table:table-cell office:value-type="float" office:value="2407260910083" calcext:value-type="float">
            <text:p>24072609100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U SPECIALS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.94%</text:p>
          </table:table-cell>
          <table:table-cell office:value-type="float" office:value="1631.6" calcext:value-type="float">
            <text:p>1631.6</text:p>
          </table:table-cell>
          <table:table-cell office:value-type="float" office:value="1594.48" calcext:value-type="float">
            <text:p>1594.48</text:p>
          </table:table-cell>
          <table:table-cell office:value-type="string" calcext:value-type="string">
            <text:p>2.46%</text:p>
          </table:table-cell>
          <table:table-cell office:value-type="float" office:value="1086.48" calcext:value-type="float">
            <text:p>1086.48</text:p>
          </table:table-cell>
          <table:table-cell office:value-type="string" calcext:value-type="string">
            <text:p>68.14%</text:p>
          </table:table-cell>
          <table:table-cell/>
          <table:table-cell table:style-name="ce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Go for MILO Athletic</text:p>
          </table:table-cell>
          <table:table-cell office:value-type="float" office:value="2408171209235" calcext:value-type="float">
            <text:p>24081712092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67.6" calcext:value-type="float">
            <text:p>67.6</text:p>
          </table:table-cell>
          <table:table-cell office:value-type="float" office:value="64.22" calcext:value-type="float">
            <text:p>64.22</text:p>
          </table:table-cell>
          <table:table-cell office:value-type="string" calcext:value-type="string">
            <text:p>0.10%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35.60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Go for MILO Athletic</text:p>
          </table:table-cell>
          <table:table-cell office:value-type="float" office:value="2408171213270" calcext:value-type="float">
            <text:p>240817121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6.9" calcext:value-type="float">
            <text:p>16.9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0.02%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32.02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Kueh-zy Good</text:p>
          </table:table-cell>
          <table:table-cell office:value-type="float" office:value="2408171215304" calcext:value-type="float">
            <text:p>24081712153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0.07%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32.73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Kueh-zy Good</text:p>
          </table:table-cell>
          <table:table-cell office:value-type="float" office:value="2408171217056" calcext:value-type="float">
            <text:p>24081712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You're a Gem</text:p>
          </table:table-cell>
          <table:table-cell office:value-type="float" office:value="2408171443035" calcext:value-type="float">
            <text:p>2408171443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2.93" calcext:value-type="float">
            <text:p>42.93</text:p>
          </table:table-cell>
          <table:table-cell office:value-type="string" calcext:value-type="string">
            <text:p>0.07%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27.74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You're a Gem</text:p>
          </table:table-cell>
          <table:table-cell office:value-type="float" office:value="2408171443035" calcext:value-type="float">
            <text:p>2408171443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63.6" calcext:value-type="float">
            <text:p>63.6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0.09%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29.70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Yummy Mamee Athletic</text:p>
          </table:table-cell>
          <table:table-cell office:value-type="float" office:value="2408171444056" calcext:value-type="float">
            <text:p>24081714440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string" calcext:value-type="string">
            <text:p>0.03%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38.82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Journal - Fabric Bound (Batik)</text:p>
          </table:table-cell>
          <table:table-cell office:value-type="float" office:value="2408211743293" calcext:value-type="float">
            <text:p>2408211743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0.2" calcext:value-type="float">
            <text:p>70.2</text:p>
          </table:table-cell>
          <table:table-cell office:value-type="string" calcext:value-type="string">
            <text:p>0.11%</text:p>
          </table:table-cell>
          <table:table-cell office:value-type="float" office:value="26.77" calcext:value-type="float">
            <text:p>26.77</text:p>
          </table:table-cell>
          <table:table-cell office:value-type="string" calcext:value-type="string">
            <text:p>38.13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408281038206" calcext:value-type="float">
            <text:p>2408281038206</text:p>
          </table:table-cell>
          <table:table-cell office:value-type="string" calcext:value-type="string">
            <text:p>Cutenes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3.8" calcext:value-type="float">
            <text:p>23.8</text:p>
          </table:table-cell>
          <table:table-cell office:value-type="string" calcext:value-type="string">
            <text:p>0.04%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408281038206" calcext:value-type="float">
            <text:p>2408281038206</text:p>
          </table:table-cell>
          <table:table-cell office:value-type="string" calcext:value-type="string">
            <text:p>Cutenes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35.7" calcext:value-type="float">
            <text:p>35.7</text:p>
          </table:table-cell>
          <table:table-cell office:value-type="string" calcext:value-type="string">
            <text:p>0.06%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after's Studio - Epsom Bath Salt</text:p>
          </table:table-cell>
          <table:table-cell office:value-type="float" office:value="2410171652577" calcext:value-type="float">
            <text:p>241017165257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.11%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40.00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appiness Initiative - Well-being Journal</text:p>
          </table:table-cell>
          <table:table-cell office:value-type="float" office:value="2410301732087" calcext:value-type="float">
            <text:p>2410301732087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iness initi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string" calcext:value-type="string">
            <text:p>0.14%</text:p>
          </table:table-cell>
          <table:table-cell office:value-type="float" office:value="30.74" calcext:value-type="float">
            <text:p>30.74</text:p>
          </table:table-cell>
          <table:table-cell office:value-type="string" calcext:value-type="string">
            <text:p>35.01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Happiness Initiativ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Dish Scrubs</text:p>
          </table:table-cell>
          <table:table-cell office:value-type="float" office:value="2411010959406" calcext:value-type="float">
            <text:p>2411010959406</text:p>
          </table:table-cell>
          <table:table-cell office:value-type="string" calcext:value-type="string">
            <text:p>3.5" x 5.5"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l Things Felt - Christmas Ornament</text:p>
          </table:table-cell>
          <table:table-cell office:value-type="float" office:value="2411041424508" calcext:value-type="float">
            <text:p>2411041424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9%</text:p>
          </table:table-cell>
          <table:table-cell office:value-type="float" office:value="520" calcext:value-type="float">
            <text:p>520</text:p>
          </table:table-cell>
          <table:table-cell office:value-type="float" office:value="486.69" calcext:value-type="float">
            <text:p>486.69</text:p>
          </table:table-cell>
          <table:table-cell office:value-type="string" calcext:value-type="string">
            <text:p>0.75%</text:p>
          </table:table-cell>
          <table:table-cell office:value-type="float" office:value="174.69" calcext:value-type="float">
            <text:p>174.69</text:p>
          </table:table-cell>
          <table:table-cell office:value-type="string" calcext:value-type="string">
            <text:p>35.89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l Things Felt - Christmas Ornament</text:p>
          </table:table-cell>
          <table:table-cell office:value-type="float" office:value="2411041424508" calcext:value-type="float">
            <text:p>2411041424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%</text:p>
          </table:table-cell>
          <table:table-cell office:value-type="float" office:value="220" calcext:value-type="float">
            <text:p>220</text:p>
          </table:table-cell>
          <table:table-cell office:value-type="float" office:value="202.22" calcext:value-type="float">
            <text:p>202.22</text:p>
          </table:table-cell>
          <table:table-cell office:value-type="string" calcext:value-type="string">
            <text:p>0.31%</text:p>
          </table:table-cell>
          <table:table-cell office:value-type="float" office:value="70.22" calcext:value-type="float">
            <text:p>70.22</text:p>
          </table:table-cell>
          <table:table-cell office:value-type="string" calcext:value-type="string">
            <text:p>34.72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l Things Felt - Singapore Ornament</text:p>
          </table:table-cell>
          <table:table-cell office:value-type="float" office:value="2411041425062" calcext:value-type="float">
            <text:p>241104142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3%</text:p>
          </table:table-cell>
          <table:table-cell office:value-type="float" office:value="420" calcext:value-type="float">
            <text:p>420</text:p>
          </table:table-cell>
          <table:table-cell office:value-type="float" office:value="394.73" calcext:value-type="float">
            <text:p>394.73</text:p>
          </table:table-cell>
          <table:table-cell office:value-type="string" calcext:value-type="string">
            <text:p>0.61%</text:p>
          </table:table-cell>
          <table:table-cell office:value-type="float" office:value="142.73" calcext:value-type="float">
            <text:p>142.73</text:p>
          </table:table-cell>
          <table:table-cell office:value-type="string" calcext:value-type="string">
            <text:p>36.16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l Things Felt - Singapore Ornament</text:p>
          </table:table-cell>
          <table:table-cell office:value-type="float" office:value="2411041425062" calcext:value-type="float">
            <text:p>241104142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60" calcext:value-type="float">
            <text:p>60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0.09%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37.69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l Things Felt - Winter Ornament</text:p>
          </table:table-cell>
          <table:table-cell office:value-type="float" office:value="2411041425215" calcext:value-type="float">
            <text:p>2411041425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5%</text:p>
          </table:table-cell>
          <table:table-cell office:value-type="float" office:value="322" calcext:value-type="float">
            <text:p>322</text:p>
          </table:table-cell>
          <table:table-cell office:value-type="float" office:value="311.18" calcext:value-type="float">
            <text:p>311.18</text:p>
          </table:table-cell>
          <table:table-cell office:value-type="string" calcext:value-type="string">
            <text:p>0.48%</text:p>
          </table:table-cell>
          <table:table-cell office:value-type="float" office:value="117.98" calcext:value-type="float">
            <text:p>117.98</text:p>
          </table:table-cell>
          <table:table-cell office:value-type="string" calcext:value-type="string">
            <text:p>37.91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ll Things Felt - Winter Ornament</text:p>
          </table:table-cell>
          <table:table-cell office:value-type="float" office:value="2411041425215" calcext:value-type="float">
            <text:p>2411041425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%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.15%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ll Things Fe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JOMO Studio - Skindle</text:p>
          </table:table-cell>
          <table:table-cell office:value-type="float" office:value="2411051329381" calcext:value-type="float">
            <text:p>2411051329381</text:p>
          </table:table-cell>
          <table:table-cell office:value-type="string" calcext:value-type="string">
            <text:p>Coastal Fores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OMO Stud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.28%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JOMO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Keep on Bee-lieving</text:p>
          </table:table-cell>
          <table:table-cell office:value-type="float" office:value="2412191107396" calcext:value-type="float">
            <text:p>24121911073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string" calcext:value-type="string">
            <text:p>0.05%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34.97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Keep on Bee-lieving</text:p>
          </table:table-cell>
          <table:table-cell office:value-type="float" office:value="2412191112147" calcext:value-type="float">
            <text:p>2412191112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queezy Lemon</text:p>
          </table:table-cell>
          <table:table-cell office:value-type="float" office:value="2412191213226" calcext:value-type="float">
            <text:p>24121912132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0.05%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31.55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queezy Lemon</text:p>
          </table:table-cell>
          <table:table-cell office:value-type="float" office:value="2412191213325" calcext:value-type="float">
            <text:p>241219121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0.07%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32.73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Peanut Perfect</text:p>
          </table:table-cell>
          <table:table-cell office:value-type="float" office:value="2412191215008" calcext:value-type="float">
            <text:p>2412191215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Emotional Ketchup</text:p>
          </table:table-cell>
          <table:table-cell office:value-type="float" office:value="2412191219303" calcext:value-type="float">
            <text:p>2412191219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28.62" calcext:value-type="float">
            <text:p>28.62</text:p>
          </table:table-cell>
          <table:table-cell office:value-type="string" calcext:value-type="string">
            <text:p>0.04%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27.74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Juice Do It</text:p>
          </table:table-cell>
          <table:table-cell office:value-type="float" office:value="2412191221399" calcext:value-type="float">
            <text:p>24121912213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Juice Do It</text:p>
          </table:table-cell>
          <table:table-cell office:value-type="float" office:value="2412191222167" calcext:value-type="float">
            <text:p>2412191222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Large)</text:p>
          </table:table-cell>
          <table:table-cell office:value-type="float" office:value="2502210909244" calcext:value-type="float">
            <text:p>2502210909244</text:p>
          </table:table-cell>
          <table:table-cell office:value-type="string" calcext:value-type="string">
            <text:p>Tonka &amp; Ou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iau Candle (Large)</text:p>
          </table:table-cell>
          <table:table-cell office:value-type="float" office:value="2502210909244" calcext:value-type="float">
            <text:p>2502210909244</text:p>
          </table:table-cell>
          <table:table-cell office:value-type="string" calcext:value-type="string">
            <text:p>Tonka &amp; Ou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Large)</text:p>
          </table:table-cell>
          <table:table-cell office:value-type="float" office:value="2502210909350" calcext:value-type="float">
            <text:p>2502210909350</text:p>
          </table:table-cell>
          <table:table-cell office:value-type="string" calcext:value-type="string">
            <text:p>Matcha &amp; Bergam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iau Candle (Large)</text:p>
          </table:table-cell>
          <table:table-cell office:value-type="float" office:value="2502210909350" calcext:value-type="float">
            <text:p>2502210909350</text:p>
          </table:table-cell>
          <table:table-cell office:value-type="string" calcext:value-type="string">
            <text:p>Matcha &amp; Bergam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0.19%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51.25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2502210909428" calcext:value-type="float">
            <text:p>2502210909428</text:p>
          </table:table-cell>
          <table:table-cell office:value-type="string" calcext:value-type="string">
            <text:p>Tonka &amp; Ou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3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.10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Riau Candle (Medium)</text:p>
          </table:table-cell>
          <table:table-cell office:value-type="float" office:value="2502210909510" calcext:value-type="float">
            <text:p>2502210909510</text:p>
          </table:table-cell>
          <table:table-cell office:value-type="string" calcext:value-type="string">
            <text:p>Matcha &amp; Bergam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.67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Riau Candle (Small)</text:p>
          </table:table-cell>
          <table:table-cell office:value-type="float" office:value="2502210910097" calcext:value-type="float">
            <text:p>2502210910097</text:p>
          </table:table-cell>
          <table:table-cell office:value-type="string" calcext:value-type="string">
            <text:p>Matcha &amp; Bergam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63.89%</text:p>
          </table:table-cell>
          <table:table-cell/>
          <table:table-cell office:value-type="string" calcext:value-type="string">
            <text:p>Riau Cand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A3</text:p>
          </table:table-cell>
          <table:table-cell office:value-type="float" office:value="2503111429121" calcext:value-type="float">
            <text:p>2503111429121</text:p>
          </table:table-cell>
          <table:table-cell office:value-type="string" calcext:value-type="string">
            <text:p>Beep Bee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8.9" calcext:value-type="float">
            <text:p>18.9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0.03%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33.33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503111429220" calcext:value-type="float">
            <text:p>2503111429220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string" calcext:value-type="string">
            <text:p>0.07%</text:p>
          </table:table-cell>
          <table:table-cell office:value-type="float" office:value="19.04" calcext:value-type="float">
            <text:p>19.0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oodle Dat - Reusable Colouring Mat (A5 Pack)</text:p>
          </table:table-cell>
          <table:table-cell office:value-type="float" office:value="2503111429220" calcext:value-type="float">
            <text:p>2503111429220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Doodle D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string" calcext:value-type="string">
            <text:p>0.02%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Doodle D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Protein / Meat</text:p>
          </table:table-cell>
          <table:table-cell office:value-type="string" calcext:value-type="string">
            <text:p>2503201327108-1</text:p>
          </table:table-cell>
          <table:table-cell office:value-type="string" calcext:value-type="string">
            <text:p>Oven-Baked Salmon (1pc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dd Protein / Meat</text:p>
          </table:table-cell>
          <table:table-cell office:value-type="string" calcext:value-type="string">
            <text:p>2503201327108-1</text:p>
          </table:table-cell>
          <table:table-cell office:value-type="string" calcext:value-type="string">
            <text:p>Oven-Baked Salmon (1pc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Protein / Meat</text:p>
          </table:table-cell>
          <table:table-cell office:value-type="string" calcext:value-type="string">
            <text:p>2503201327108-2</text:p>
          </table:table-cell>
          <table:table-cell office:value-type="string" calcext:value-type="string">
            <text:p>Roasted Herbed Chicken (1pc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%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.00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dd Protein / Meat</text:p>
          </table:table-cell>
          <table:table-cell office:value-type="string" calcext:value-type="string">
            <text:p>2503201327108-3</text:p>
          </table:table-cell>
          <table:table-cell office:value-type="string" calcext:value-type="string">
            <text:p>Turmeric Chicken (1pc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.3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dd Carbs / Base</text:p>
          </table:table-cell>
          <table:table-cell office:value-type="string" calcext:value-type="string">
            <text:p>2503201333543-1</text:p>
          </table:table-cell>
          <table:table-cell office:value-type="string" calcext:value-type="string">
            <text:p>Pesto Pasta (Base Only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999980" calcext:value-type="float">
            <text:p>999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.14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Add Carbs / Base</text:p>
          </table:table-cell>
          <table:table-cell office:value-type="string" calcext:value-type="string">
            <text:p>2503201333543-1</text:p>
          </table:table-cell>
          <table:table-cell office:value-type="string" calcext:value-type="string">
            <text:p>Pesto Pasta (Base Only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THER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5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elping Hands - Hand Woven Bag 38</text:p>
          </table:table-cell>
          <table:table-cell office:value-type="float" office:value="2504091059537" calcext:value-type="float">
            <text:p>2504091059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elping Hands Pe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8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.30%</text:p>
          </table:table-cell>
          <table:table-cell/>
          <table:table-cell office:value-type="string" calcext:value-type="string">
            <text:p>Helping Hands Pen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Margherita Pizza</text:p>
          </table:table-cell>
          <table:table-cell office:value-type="float" office:value="2504191139184" calcext:value-type="float">
            <text:p>2504191139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izz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%</text:p>
          </table:table-cell>
          <table:table-cell office:value-type="float" office:value="238" calcext:value-type="float">
            <text:p>238</text:p>
          </table:table-cell>
          <table:table-cell office:value-type="float" office:value="234.6" calcext:value-type="float">
            <text:p>234.6</text:p>
          </table:table-cell>
          <table:table-cell office:value-type="string" calcext:value-type="string">
            <text:p>0.36%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67.18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Hawaiian Pizza</text:p>
          </table:table-cell>
          <table:table-cell office:value-type="float" office:value="2504191140104" calcext:value-type="float">
            <text:p>2504191140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izz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%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0.33%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66.67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Diavola Pizza</text:p>
          </table:table-cell>
          <table:table-cell office:value-type="float" office:value="2504191140500" calcext:value-type="float">
            <text:p>2504191140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izz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0.12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5.79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Chicken Ham + Mushroom Pizza</text:p>
          </table:table-cell>
          <table:table-cell office:value-type="float" office:value="2504191142061" calcext:value-type="float">
            <text:p>25041911420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15%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60.5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Avo Good Time</text:p>
          </table:table-cell>
          <table:table-cell office:value-type="float" office:value="2505160920246" calcext:value-type="float">
            <text:p>25051609202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string" calcext:value-type="string">
            <text:p>0.05%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Avo Good Time</text:p>
          </table:table-cell>
          <table:table-cell office:value-type="float" office:value="2505160920338" calcext:value-type="float">
            <text:p>2505160920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Breakfast Waffle</text:p>
          </table:table-cell>
          <table:table-cell office:value-type="float" office:value="2505160920406" calcext:value-type="float">
            <text:p>25051609204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0.05%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31.55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B-ready Pigeon</text:p>
          </table:table-cell>
          <table:table-cell office:value-type="float" office:value="2505160920543" calcext:value-type="float">
            <text:p>2505160920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B-ready Pigeon</text:p>
          </table:table-cell>
          <table:table-cell office:value-type="float" office:value="2505160921014" calcext:value-type="float">
            <text:p>25051609210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More Espresso</text:p>
          </table:table-cell>
          <table:table-cell office:value-type="float" office:value="2505160921229" calcext:value-type="float">
            <text:p>25051609212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More Espresso</text:p>
          </table:table-cell>
          <table:table-cell office:value-type="float" office:value="2505160921311" calcext:value-type="float">
            <text:p>2505160921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unny Side Up</text:p>
          </table:table-cell>
          <table:table-cell office:value-type="float" office:value="2505160921441" calcext:value-type="float">
            <text:p>2505160921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string" calcext:value-type="string">
            <text:p>0.05%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Sunny Side Up</text:p>
          </table:table-cell>
          <table:table-cell office:value-type="float" office:value="2505160921441" calcext:value-type="float">
            <text:p>2505160921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Great White</text:p>
          </table:table-cell>
          <table:table-cell office:value-type="float" office:value="2505160921588" calcext:value-type="float">
            <text:p>25051609215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Killing It Orca Athletic</text:p>
          </table:table-cell>
          <table:table-cell office:value-type="float" office:value="2505160922196" calcext:value-type="float">
            <text:p>25051609221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Turtle-y Awesome Athletic</text:p>
          </table:table-cell>
          <table:table-cell office:value-type="float" office:value="2505160922332" calcext:value-type="float">
            <text:p>25051609223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Turtle-y Awesome Athletic</text:p>
          </table:table-cell>
          <table:table-cell office:value-type="float" office:value="2505160922394" calcext:value-type="float">
            <text:p>250516092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6041214119" calcext:value-type="float">
            <text:p>2506041214119</text:p>
          </table:table-cell>
          <table:table-cell office:value-type="string" calcext:value-type="string">
            <text:p>Book Town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6041214409" calcext:value-type="float">
            <text:p>2506041214409</text:p>
          </table:table-cell>
          <table:table-cell office:value-type="string" calcext:value-type="string">
            <text:p>Otters &amp; Friends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6041214492" calcext:value-type="float">
            <text:p>2506041214492</text:p>
          </table:table-cell>
          <table:table-cell office:value-type="string" calcext:value-type="string">
            <text:p>Sunset Safari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elping Hands - Mini Bamboo</text:p>
          </table:table-cell>
          <table:table-cell office:value-type="float" office:value="2506261754532" calcext:value-type="float">
            <text:p>25062617545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elping Hands Pen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15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Helping Hands Pen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elping Hands - Mini Mata Juhit Bamboo</text:p>
          </table:table-cell>
          <table:table-cell office:value-type="float" office:value="2506261755409" calcext:value-type="float">
            <text:p>25062617554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elping Hands Pe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0.08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46%</text:p>
          </table:table-cell>
          <table:table-cell/>
          <table:table-cell office:value-type="string" calcext:value-type="string">
            <text:p>Helping Hands Pen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18355" calcext:value-type="float">
            <text:p>2507041718355</text:p>
          </table:table-cell>
          <table:table-cell office:value-type="string" calcext:value-type="string">
            <text:p>Unstoppabl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2%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19048" calcext:value-type="float">
            <text:p>2507041719048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0.01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19123" calcext:value-type="float">
            <text:p>2507041719123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0.01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19208" calcext:value-type="float">
            <text:p>2507041719208</text:p>
          </table:table-cell>
          <table:table-cell office:value-type="string" calcext:value-type="string">
            <text:p>Love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0.01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19352" calcext:value-type="float">
            <text:p>2507041719352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0.01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Affirmation Pencil</text:p>
          </table:table-cell>
          <table:table-cell office:value-type="float" office:value="2507041720075" calcext:value-type="float">
            <text:p>2507041720075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0.01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7171033113" calcext:value-type="float">
            <text:p>2507171033113</text:p>
          </table:table-cell>
          <table:table-cell office:value-type="string" calcext:value-type="string">
            <text:p>Teacup Tale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7%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7171033274" calcext:value-type="float">
            <text:p>2507171033274</text:p>
          </table:table-cell>
          <table:table-cell office:value-type="string" calcext:value-type="string">
            <text:p>Squawk &amp; Snuggles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7171038354" calcext:value-type="float">
            <text:p>2507171038354</text:p>
          </table:table-cell>
          <table:table-cell office:value-type="string" calcext:value-type="string">
            <text:p>Italian Villas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- The Peranakan Tiles Wristlet Pouch</text:p>
          </table:table-cell>
          <table:table-cell office:value-type="float" office:value="2507301444499" calcext:value-type="float">
            <text:p>25073014444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34.71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- The Peranakan Tiles Enamel Keychain</text:p>
          </table:table-cell>
          <table:table-cell office:value-type="float" office:value="2507301454269" calcext:value-type="float">
            <text:p>2507301454269</text:p>
          </table:table-cell>
          <table:table-cell office:value-type="string" calcext:value-type="string">
            <text:p>Blue/Gree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3%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34.91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- The Peranakan Tiles Enamel Keychain</text:p>
          </table:table-cell>
          <table:table-cell office:value-type="float" office:value="2507301454436" calcext:value-type="float">
            <text:p>2507301454436</text:p>
          </table:table-cell>
          <table:table-cell office:value-type="string" calcext:value-type="string">
            <text:p>Pink/Yellow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3%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34.91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PD - The Songbird Pouch Wristlet Pouch</text:p>
          </table:table-cell>
          <table:table-cell office:value-type="float" office:value="2507301454597" calcext:value-type="float">
            <text:p>25073014545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P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6%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12.95%</text:p>
          </table:table-cell>
          <table:table-cell/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Curry On Athletic Sock</text:p>
          </table:table-cell>
          <table:table-cell office:value-type="float" office:value="2508061511421" calcext:value-type="float">
            <text:p>25080615114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string" calcext:value-type="string">
            <text:p>0.03%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38.82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Juicy Ribena Athletic Sock</text:p>
          </table:table-cell>
          <table:table-cell office:value-type="float" office:value="2508061516297" calcext:value-type="float">
            <text:p>2508061516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6.9" calcext:value-type="float">
            <text:p>16.9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0.02%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32.02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Juicy Ribena Athletic Sock</text:p>
          </table:table-cell>
          <table:table-cell office:value-type="float" office:value="2508061516440" calcext:value-type="float">
            <text:p>25080615164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string" calcext:value-type="string">
            <text:p>0.03%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38.82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Kacang Crush Sock</text:p>
          </table:table-cell>
          <table:table-cell office:value-type="float" office:value="2508061518369" calcext:value-type="float">
            <text:p>2508061518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lio - Mini Tumble Oval</text:p>
          </table:table-cell>
          <table:table-cell office:value-type="float" office:value="2508230946399" calcext:value-type="float">
            <text:p>2508230946399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4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Bramb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Roller Coaster Athletic</text:p>
          </table:table-cell>
          <table:table-cell office:value-type="float" office:value="2508281719126" calcext:value-type="float">
            <text:p>250828171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string" calcext:value-type="string">
            <text:p>0.03%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38.82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Tart &amp; Soul</text:p>
          </table:table-cell>
          <table:table-cell office:value-type="float" office:value="2508281719348" calcext:value-type="float">
            <text:p>25082817193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string" calcext:value-type="string">
            <text:p>0.02%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34.97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9021641448" calcext:value-type="float">
            <text:p>2509021641448</text:p>
          </table:table-cell>
          <table:table-cell office:value-type="string" calcext:value-type="string">
            <text:p>Bugs &amp; Blooms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09021641530" calcext:value-type="float">
            <text:p>2509021641530</text:p>
          </table:table-cell>
          <table:table-cell office:value-type="string" calcext:value-type="string">
            <text:p>Straits Charm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ittle Botany - Newcomer Kit</text:p>
          </table:table-cell>
          <table:table-cell office:value-type="float" office:value="2510041203066" calcext:value-type="float">
            <text:p>25100412030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2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ittle Botany - Plant 18</text:p>
          </table:table-cell>
          <table:table-cell office:value-type="float" office:value="2510041203271" calcext:value-type="float">
            <text:p>2510041203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3%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ittle Botany - Plant 28</text:p>
          </table:table-cell>
          <table:table-cell office:value-type="float" office:value="2510041203424" calcext:value-type="float">
            <text:p>2510041203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.04%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ittle Botany - Plant 38</text:p>
          </table:table-cell>
          <table:table-cell office:value-type="float" office:value="2510041203509" calcext:value-type="float">
            <text:p>2510041203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0.06%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Little Botany - Plant 38</text:p>
          </table:table-cell>
          <table:table-cell office:value-type="float" office:value="2510041203509" calcext:value-type="float">
            <text:p>2510041203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0.12%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Little Botany - Plant 48</text:p>
          </table:table-cell>
          <table:table-cell office:value-type="float" office:value="2510041203561" calcext:value-type="float">
            <text:p>2510041203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07%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30.00%</text:p>
          </table:table-cell>
          <table:table-cell/>
          <table:table-cell office:value-type="string" calcext:value-type="string">
            <text:p>Little Bota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 Manifest</text:p>
          </table:table-cell>
          <table:table-cell office:value-type="float" office:value="2510251115272" calcext:value-type="float">
            <text:p>2510251115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0.14%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 Unwind</text:p>
          </table:table-cell>
          <table:table-cell office:value-type="float" office:value="2510251115364" calcext:value-type="float">
            <text:p>251025111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110" calcext:value-type="float">
            <text:p>110</text:p>
          </table:table-cell>
          <table:table-cell office:value-type="float" office:value="107.8" calcext:value-type="float">
            <text:p>107.8</text:p>
          </table:table-cell>
          <table:table-cell office:value-type="string" calcext:value-type="string">
            <text:p>0.17%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33.67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 Bloom</text:p>
          </table:table-cell>
          <table:table-cell office:value-type="float" office:value="2510251115579" calcext:value-type="float">
            <text:p>25102511155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.10%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 Fresh Start</text:p>
          </table:table-cell>
          <table:table-cell office:value-type="float" office:value="2510251116071" calcext:value-type="float">
            <text:p>25102511160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44" calcext:value-type="float">
            <text:p>44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0.06%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31.58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 Inner Peace</text:p>
          </table:table-cell>
          <table:table-cell office:value-type="float" office:value="2510251116149" calcext:value-type="float">
            <text:p>2510251116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110" calcext:value-type="float">
            <text:p>110</text:p>
          </table:table-cell>
          <table:table-cell office:value-type="float" office:value="107.8" calcext:value-type="float">
            <text:p>107.8</text:p>
          </table:table-cell>
          <table:table-cell office:value-type="string" calcext:value-type="string">
            <text:p>0.17%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33.67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11061730402" calcext:value-type="float">
            <text:p>2511061730402</text:p>
          </table:table-cell>
          <table:table-cell office:value-type="string" calcext:value-type="string">
            <text:p>Tomato Vine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My Christmas Advent Calendar</text:p>
          </table:table-cell>
          <table:table-cell office:value-type="float" office:value="2511101113523" calcext:value-type="float">
            <text:p>25111011135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173.4" calcext:value-type="float">
            <text:p>173.4</text:p>
          </table:table-cell>
          <table:table-cell office:value-type="string" calcext:value-type="string">
            <text:p>0.27%</text:p>
          </table:table-cell>
          <table:table-cell office:value-type="float" office:value="60.66" calcext:value-type="float">
            <text:p>60.66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More than Your Regular Emotion Cards</text:p>
          </table:table-cell>
          <table:table-cell office:value-type="float" office:value="2511101115367" calcext:value-type="float">
            <text:p>2511101115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office:value-type="float" office:value="173.4" calcext:value-type="float">
            <text:p>173.4</text:p>
          </table:table-cell>
          <table:table-cell office:value-type="float" office:value="170.51" calcext:value-type="float">
            <text:p>170.51</text:p>
          </table:table-cell>
          <table:table-cell office:value-type="string" calcext:value-type="string">
            <text:p>0.26%</text:p>
          </table:table-cell>
          <table:table-cell office:value-type="float" office:value="57.77" calcext:value-type="float">
            <text:p>57.77</text:p>
          </table:table-cell>
          <table:table-cell office:value-type="string" calcext:value-type="string">
            <text:p>33.88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Emotions Explorers Board Game</text:p>
          </table:table-cell>
          <table:table-cell office:value-type="float" office:value="2511101117101" calcext:value-type="float">
            <text:p>251110111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office:value-type="float" office:value="184.5" calcext:value-type="float">
            <text:p>184.5</text:p>
          </table:table-cell>
          <table:table-cell office:value-type="float" office:value="173.43" calcext:value-type="float">
            <text:p>173.43</text:p>
          </table:table-cell>
          <table:table-cell office:value-type="string" calcext:value-type="string">
            <text:p>0.27%</text:p>
          </table:table-cell>
          <table:table-cell office:value-type="float" office:value="53.48" calcext:value-type="float">
            <text:p>53.48</text:p>
          </table:table-cell>
          <table:table-cell office:value-type="string" calcext:value-type="string">
            <text:p>30.84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Holly Jolly Christmas Tree</text:p>
          </table:table-cell>
          <table:table-cell office:value-type="float" office:value="2511101118566" calcext:value-type="float">
            <text:p>25111011185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string" calcext:value-type="string">
            <text:p>0.04%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Bible Stories Busy Book</text:p>
          </table:table-cell>
          <table:table-cell office:value-type="float" office:value="2511101119488" calcext:value-type="float">
            <text:p>2511101119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64.9" calcext:value-type="float">
            <text:p>64.9</text:p>
          </table:table-cell>
          <table:table-cell office:value-type="string" calcext:value-type="string">
            <text:p>0.10%</text:p>
          </table:table-cell>
          <table:table-cell office:value-type="float" office:value="22.71" calcext:value-type="float">
            <text:p>22.71</text:p>
          </table:table-cell>
          <table:table-cell office:value-type="string" calcext:value-type="string">
            <text:p>34.99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Snail Cup</text:p>
          </table:table-cell>
          <table:table-cell office:value-type="float" office:value="2511111219307" calcext:value-type="float">
            <text:p>2511111219307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.12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Snail Cup</text:p>
          </table:table-cell>
          <table:table-cell office:value-type="float" office:value="2511111219376" calcext:value-type="float">
            <text:p>2511111219376</text:p>
          </table:table-cell>
          <table:table-cell office:value-type="string" calcext:value-type="string">
            <text:p>Midnight Poo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2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.58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Christmas Winter Tree</text:p>
          </table:table-cell>
          <table:table-cell office:value-type="float" office:value="2511111220068" calcext:value-type="float">
            <text:p>2511111220068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3%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Christmas Winter Tree</text:p>
          </table:table-cell>
          <table:table-cell office:value-type="float" office:value="2511111220143" calcext:value-type="float">
            <text:p>251111122014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Christmas Winter Mug</text:p>
          </table:table-cell>
          <table:table-cell office:value-type="float" office:value="2511111220273" calcext:value-type="float">
            <text:p>25111112202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0.42%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Christmas Winter Plate</text:p>
          </table:table-cell>
          <table:table-cell office:value-type="float" office:value="2511111220341" calcext:value-type="float">
            <text:p>2511111220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7%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Snail Mug</text:p>
          </table:table-cell>
          <table:table-cell office:value-type="float" office:value="2511111220419" calcext:value-type="float">
            <text:p>2511111220419</text:p>
          </table:table-cell>
          <table:table-cell office:value-type="string" calcext:value-type="string">
            <text:p>Tidefir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90" calcext:value-type="float">
            <text:p>9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0.12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.53%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nail Handmade Ceramics - Snail Mug</text:p>
          </table:table-cell>
          <table:table-cell office:value-type="float" office:value="2511111220471" calcext:value-type="float">
            <text:p>2511111220471</text:p>
          </table:table-cell>
          <table:table-cell office:value-type="string" calcext:value-type="string">
            <text:p>Olive Earth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.14%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Snail Handmade Cerami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Embroidered Ornament Craft Kit</text:p>
          </table:table-cell>
          <table:table-cell office:value-type="float" office:value="2511131059471" calcext:value-type="float">
            <text:p>25111310594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2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Kraft Christmas Tree</text:p>
          </table:table-cell>
          <table:table-cell office:value-type="float" office:value="2511131102467" calcext:value-type="float">
            <text:p>2511131102467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Kraft Little House</text:p>
          </table:table-cell>
          <table:table-cell office:value-type="float" office:value="2511131102566" calcext:value-type="float">
            <text:p>251113110256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2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Winter Wonderland 3D Craft Kit</text:p>
          </table:table-cell>
          <table:table-cell office:value-type="float" office:value="2511131104119" calcext:value-type="float">
            <text:p>2511131104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.14%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after's Studio - Tamanu Skin Recovery Set</text:p>
          </table:table-cell>
          <table:table-cell office:value-type="float" office:value="2511181515217" calcext:value-type="float">
            <text:p>2511181515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rafter's Studi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.09%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Crafter's Studio - Upcycled Denim Keychain</text:p>
          </table:table-cell>
          <table:table-cell office:value-type="float" office:value="2511181522222" calcext:value-type="float">
            <text:p>25111815222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Crafter's Studi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24" calcext:value-type="float">
            <text:p>2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0.03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41%</text:p>
          </table:table-cell>
          <table:table-cell/>
          <table:table-cell office:value-type="string" calcext:value-type="string">
            <text:p>Crafter's Studi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Coco Bowl</text:p>
          </table:table-cell>
          <table:table-cell office:value-type="float" office:value="2511191635516" calcext:value-type="float">
            <text:p>2511191635516</text:p>
          </table:table-cell>
          <table:table-cell office:value-type="string" calcext:value-type="string">
            <text:p>(L) 20c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45" calcext:value-type="float">
            <text:p>4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0.06%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Long Mug</text:p>
          </table:table-cell>
          <table:table-cell office:value-type="float" office:value="2511191636209" calcext:value-type="float">
            <text:p>25111916362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70" calcext:value-type="float">
            <text:p>70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0.10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.5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Long Mug</text:p>
          </table:table-cell>
          <table:table-cell office:value-type="float" office:value="2511191636254" calcext:value-type="float">
            <text:p>251119163625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0.05%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Plate</text:p>
          </table:table-cell>
          <table:table-cell office:value-type="float" office:value="2511191636308" calcext:value-type="float">
            <text:p>2511191636308</text:p>
          </table:table-cell>
          <table:table-cell office:value-type="string" calcext:value-type="string">
            <text:p>Small 14c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0.03%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Plate</text:p>
          </table:table-cell>
          <table:table-cell office:value-type="float" office:value="2511191636353" calcext:value-type="float">
            <text:p>2511191636353</text:p>
          </table:table-cell>
          <table:table-cell office:value-type="string" calcext:value-type="string">
            <text:p>Medium 22c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8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oasia - Caramel Rectangular Saucer</text:p>
          </table:table-cell>
          <table:table-cell office:value-type="float" office:value="2511191636452" calcext:value-type="float">
            <text:p>2511191636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oasia Ho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22" calcext:value-type="float">
            <text:p>22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0.03%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Poasia Ho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Word Bracelet</text:p>
          </table:table-cell>
          <table:table-cell office:value-type="float" office:value="2511221614290" calcext:value-type="float">
            <text:p>2511221614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.11%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Word Earrings</text:p>
          </table:table-cell>
          <table:table-cell office:value-type="float" office:value="2511221626583" calcext:value-type="float">
            <text:p>25112216265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Word Ring</text:p>
          </table:table-cell>
          <table:table-cell office:value-type="float" office:value="2511221627146" calcext:value-type="float">
            <text:p>2511221627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Customisation</text:p>
          </table:table-cell>
          <table:table-cell office:value-type="float" office:value="2511221627214" calcext:value-type="float">
            <text:p>2511221627214</text:p>
          </table:table-cell>
          <table:table-cell office:value-type="string" calcext:value-type="string">
            <text:p>Bracelet Chai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office:value-type="float" office:value="108" calcext:value-type="float">
            <text:p>108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0.16%</text:p>
          </table:table-cell>
          <table:table-cell office:value-type="float" office:value="39.42" calcext:value-type="float">
            <text:p>39.42</text:p>
          </table:table-cell>
          <table:table-cell office:value-type="string" calcext:value-type="string">
            <text:p>38.42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Customisation</text:p>
          </table:table-cell>
          <table:table-cell office:value-type="float" office:value="2511221627276" calcext:value-type="float">
            <text:p>2511221627276</text:p>
          </table:table-cell>
          <table:table-cell office:value-type="string" calcext:value-type="string">
            <text:p>Necklace Chai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Customisation</text:p>
          </table:table-cell>
          <table:table-cell office:value-type="float" office:value="2511221627344" calcext:value-type="float">
            <text:p>2511221627344</text:p>
          </table:table-cell>
          <table:table-cell office:value-type="string" calcext:value-type="string">
            <text:p>Charms (S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.11%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Customisation</text:p>
          </table:table-cell>
          <table:table-cell office:value-type="float" office:value="2511221627412" calcext:value-type="float">
            <text:p>2511221627412</text:p>
          </table:table-cell>
          <table:table-cell office:value-type="string" calcext:value-type="string">
            <text:p>Charms (M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%</text:p>
          </table:table-cell>
          <table:table-cell office:value-type="float" office:value="96" calcext:value-type="float">
            <text:p>96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0.14%</text:p>
          </table:table-cell>
          <table:table-cell office:value-type="float" office:value="32.64" calcext:value-type="float">
            <text:p>32.64</text:p>
          </table:table-cell>
          <table:table-cell office:value-type="string" calcext:value-type="string">
            <text:p>36.76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Moodchild - Customisation</text:p>
          </table:table-cell>
          <table:table-cell office:value-type="float" office:value="2511221627481" calcext:value-type="float">
            <text:p>2511221627481</text:p>
          </table:table-cell>
          <table:table-cell office:value-type="string" calcext:value-type="string">
            <text:p>Word Charm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41.47%</text:p>
          </table:table-cell>
          <table:table-cell/>
          <table:table-cell office:value-type="string" calcext:value-type="string">
            <text:p>Moodchi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Piece of Mine - Ocean of Wonder (100 Piece Puzzle)</text:p>
          </table:table-cell>
          <table:table-cell office:value-type="float" office:value="2511251212268" calcext:value-type="float">
            <text:p>2511251212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A Piece of M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Piece of Mine - A Piece of the Past (48 Piece Puzzle)</text:p>
          </table:table-cell>
          <table:table-cell office:value-type="float" office:value="2511251212466" calcext:value-type="float">
            <text:p>2511251212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A Piece of M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Piece of Mine - Campfire Song (Mini Puzzle)</text:p>
          </table:table-cell>
          <table:table-cell office:value-type="float" office:value="2511251213029" calcext:value-type="float">
            <text:p>2511251213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7%</text:p>
          </table:table-cell>
          <table:table-cell office:value-type="float" office:value="18.66" calcext:value-type="float">
            <text:p>18.66</text:p>
          </table:table-cell>
          <table:table-cell office:value-type="string" calcext:value-type="string">
            <text:p>41.47%</text:p>
          </table:table-cell>
          <table:table-cell/>
          <table:table-cell office:value-type="string" calcext:value-type="string">
            <text:p>A Piece of M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Piece of Mine - Sweet Treats (Mini Puzzle)</text:p>
          </table:table-cell>
          <table:table-cell office:value-type="float" office:value="2511251213142" calcext:value-type="float">
            <text:p>2511251213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41.47%</text:p>
          </table:table-cell>
          <table:table-cell/>
          <table:table-cell office:value-type="string" calcext:value-type="string">
            <text:p>A Piece of M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 Piece of Mine - Hawker Favourites (Mini Puzzle)</text:p>
          </table:table-cell>
          <table:table-cell office:value-type="float" office:value="2511251213203" calcext:value-type="float">
            <text:p>25112512132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41.47%</text:p>
          </table:table-cell>
          <table:table-cell/>
          <table:table-cell office:value-type="string" calcext:value-type="string">
            <text:p>A Piece of M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ooks Beyond Borders - Felt Ornaments (Mix &amp; Match 3pcs)</text:p>
          </table:table-cell>
          <table:table-cell office:value-type="float" office:value="2512050038318" calcext:value-type="float">
            <text:p>2512050038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%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6%</text:p>
          </table:table-cell>
          <table:table-cell office:value-type="float" office:value="103.92" calcext:value-type="float">
            <text:p>103.92</text:p>
          </table:table-cell>
          <table:table-cell office:value-type="string" calcext:value-type="string">
            <text:p>34.99%</text:p>
          </table:table-cell>
          <table:table-cell/>
          <table:table-cell office:value-type="string" calcext:value-type="string">
            <text:p>Books Beyond Border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ooks Beyond Borders - Wool Journals (Bella The Balet Bear)</text:p>
          </table:table-cell>
          <table:table-cell office:value-type="float" office:value="2512050040113" calcext:value-type="float">
            <text:p>2512050040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Books Beyond Border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ooks Beyond Borders - Wool Journals (Polar's Little Passenger)</text:p>
          </table:table-cell>
          <table:table-cell office:value-type="float" office:value="2512050040311" calcext:value-type="float">
            <text:p>2512050040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70" calcext:value-type="float">
            <text:p>70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0.09%</text:p>
          </table:table-cell>
          <table:table-cell office:value-type="float" office:value="18.54" calcext:value-type="float">
            <text:p>18.54</text:p>
          </table:table-cell>
          <table:table-cell office:value-type="string" calcext:value-type="string">
            <text:p>31.16%</text:p>
          </table:table-cell>
          <table:table-cell/>
          <table:table-cell office:value-type="string" calcext:value-type="string">
            <text:p>Books Beyond Border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Books Beyond Borders - Wool Journals (Rosy Cheek Bunny)</text:p>
          </table:table-cell>
          <table:table-cell office:value-type="float" office:value="2512050040380" calcext:value-type="float">
            <text:p>2512050040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41.49%</text:p>
          </table:table-cell>
          <table:table-cell/>
          <table:table-cell office:value-type="string" calcext:value-type="string">
            <text:p>Books Beyond Border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Christmas Tag</text:p>
          </table:table-cell>
          <table:table-cell office:value-type="float" office:value="2512060909356" calcext:value-type="float">
            <text:p>2512060909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7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Wooden Train</text:p>
          </table:table-cell>
          <table:table-cell office:value-type="float" office:value="2512060910499" calcext:value-type="float">
            <text:p>2512060910499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 Carpenter - Wooden Train</text:p>
          </table:table-cell>
          <table:table-cell office:value-type="float" office:value="2512060910567" calcext:value-type="float">
            <text:p>2512060910567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%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.14%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Paper Carpen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12171500428" calcext:value-type="float">
            <text:p>2512171500428</text:p>
          </table:table-cell>
          <table:table-cell office:value-type="string" calcext:value-type="string">
            <text:p>Amalfi Coas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oodness Gracious - Beeswax Wrap (Premium)</text:p>
          </table:table-cell>
          <table:table-cell office:value-type="float" office:value="2512171501043" calcext:value-type="float">
            <text:p>2512171501043</text:p>
          </table:table-cell>
          <table:table-cell office:value-type="string" calcext:value-type="string">
            <text:p>Santorini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Goodness Grac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00%</text:p>
          </table:table-cell>
          <table:table-cell/>
          <table:table-cell office:value-type="string" calcext:value-type="string">
            <text:p>Goodness Graciou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ika Day - Self Love Affirmations</text:p>
          </table:table-cell>
          <table:table-cell office:value-type="float" office:value="2512201633430" calcext:value-type="float">
            <text:p>2512201633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ika 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7.9" calcext:value-type="float">
            <text:p>17.9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0.02%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27.75%</text:p>
          </table:table-cell>
          <table:table-cell/>
          <table:table-cell office:value-type="string" calcext:value-type="string">
            <text:p>Alika D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ika Day - Motivation Cards</text:p>
          </table:table-cell>
          <table:table-cell office:value-type="float" office:value="2512230950430" calcext:value-type="float">
            <text:p>251223095043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ika D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8.9" calcext:value-type="float">
            <text:p>8.9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0.01%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7.72%</text:p>
          </table:table-cell>
          <table:table-cell/>
          <table:table-cell office:value-type="string" calcext:value-type="string">
            <text:p>Alika D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lika Day - Motivation Cards</text:p>
          </table:table-cell>
          <table:table-cell office:value-type="float" office:value="2512231038113" calcext:value-type="float">
            <text:p>2512231038113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ika 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8.9" calcext:value-type="float">
            <text:p>8.9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0.01%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100.00%</text:p>
          </table:table-cell>
          <table:table-cell/>
          <table:table-cell office:value-type="string" calcext:value-type="string">
            <text:p>Alika D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Spring Fields | Daily Notepad</text:p>
          </table:table-cell>
          <table:table-cell office:value-type="float" office:value="25875490" calcext:value-type="float">
            <text:p>258754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string" calcext:value-type="string">
            <text:p>0.01%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41.53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Magsafe Phone Grip</text:p>
          </table:table-cell>
          <table:table-cell office:value-type="float" office:value="300004" calcext:value-type="float">
            <text:p>300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%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.12%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41.47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Giant Sticker</text:p>
          </table:table-cell>
          <table:table-cell office:value-type="float" office:value="300005" calcext:value-type="float">
            <text:p>3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3%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41.43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Spring Symphony Mousepad</text:p>
          </table:table-cell>
          <table:table-cell office:value-type="float" office:value="32279074" calcext:value-type="float">
            <text:p>32279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2%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Winter Petals | Desktop Weekly Planner</text:p>
          </table:table-cell>
          <table:table-cell office:value-type="float" office:value="3502882" calcext:value-type="float">
            <text:p>35028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Makan Tee (Black)</text:p>
          </table:table-cell>
          <table:table-cell office:value-type="float" office:value="400001" calcext:value-type="float">
            <text:p>4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1%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6.43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he Everyday Club - Makan Tee (White)</text:p>
          </table:table-cell>
          <table:table-cell office:value-type="float" office:value="400002" calcext:value-type="float">
            <text:p>4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5%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16.43%</text:p>
          </table:table-cell>
          <table:table-cell/>
          <table:table-cell office:value-type="string" calcext:value-type="string">
            <text:p>The Everyday Clu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oapnut Republic - 500ml Lemongrass Handsoap (Bottle)</text:p>
          </table:table-cell>
          <table:table-cell office:value-type="float" office:value="4897048540607" calcext:value-type="float">
            <text:p>48970485406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string" calcext:value-type="string">
            <text:p>0.02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Soapnut Republi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oapnut Republic - 500ml Multi-Purpose Cleaner (Bottle)</text:p>
          </table:table-cell>
          <table:table-cell office:value-type="float" office:value="4897048540805" calcext:value-type="float">
            <text:p>48970485408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string" calcext:value-type="string">
            <text:p>0.02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Soapnut Republi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Painter’s Garden Reusable Shopping Bag</text:p>
          </table:table-cell>
          <table:table-cell office:value-type="float" office:value="51707938" calcext:value-type="float">
            <text:p>517079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2%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Verdant Onigiri Wristlet</text:p>
          </table:table-cell>
          <table:table-cell office:value-type="float" office:value="54424354" calcext:value-type="float">
            <text:p>54424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.09%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Magnolia Onigiri Wristlet</text:p>
          </table:table-cell>
          <table:table-cell office:value-type="float" office:value="55604002" calcext:value-type="float">
            <text:p>55604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3%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Cosmos Onigiri Wristlet</text:p>
          </table:table-cell>
          <table:table-cell office:value-type="float" office:value="57504546" calcext:value-type="float">
            <text:p>575045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6%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Floral Grace Diatomite Coaster (Cream)</text:p>
          </table:table-cell>
          <table:table-cell office:value-type="float" office:value="69965090" calcext:value-type="float">
            <text:p>699650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2%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dosole Women's EZ Living - Matcha</text:p>
          </table:table-cell>
          <table:table-cell office:value-type="float" office:value="813887026403" calcext:value-type="float">
            <text:p>813887026403</text:p>
          </table:table-cell>
          <table:table-cell table:style-name="ce3" office:value-type="string" calcext:value-type="string">
            <text:p>8-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Wo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Indoso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dosole Women's EZ Living - Rust</text:p>
          </table:table-cell>
          <table:table-cell office:value-type="float" office:value="813887026595" calcext:value-type="float">
            <text:p>813887026595</text:p>
          </table:table-cell>
          <table:table-cell table:style-name="ce3" office:value-type="string" calcext:value-type="string">
            <text:p>8-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Wo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Indoso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dosole Women's EZ Living - Black</text:p>
          </table:table-cell>
          <table:table-cell office:value-type="float" office:value="813887026700" calcext:value-type="float">
            <text:p>813887026700</text:p>
          </table:table-cell>
          <table:table-cell table:style-name="ce3" office:value-type="string" calcext:value-type="string">
            <text:p>6-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Wo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Indoso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dosole Men's EZ Living - Black</text:p>
          </table:table-cell>
          <table:table-cell office:value-type="float" office:value="813887027196" calcext:value-type="float">
            <text:p>8138870271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Indoso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dosole Men's EZ Living - Black</text:p>
          </table:table-cell>
          <table:table-cell office:value-type="float" office:value="813887027219" calcext:value-type="float">
            <text:p>8138870272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.08%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Indoso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Quirky Critters Enamel Pin | Otter Pair</text:p>
          </table:table-cell>
          <table:table-cell office:value-type="float" office:value="82198306" calcext:value-type="float">
            <text:p>82198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3%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Garden Fables Christmas Postcards - Set of 4</text:p>
          </table:table-cell>
          <table:table-cell office:value-type="float" office:value="87874082" calcext:value-type="float">
            <text:p>878740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3%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38.42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Green Kulture - 1L Floor Clean Liquid</text:p>
          </table:table-cell>
          <table:table-cell office:value-type="float" office:value="8881304485074" calcext:value-type="float">
            <text:p>8881304485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9.65" calcext:value-type="float">
            <text:p>9.65</text:p>
          </table:table-cell>
          <table:table-cell office:value-type="string" calcext:value-type="string">
            <text:p>0.01%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34.72%</text:p>
          </table:table-cell>
          <table:table-cell/>
          <table:table-cell office:value-type="string" calcext:value-type="string">
            <text:p>Green Kult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Potong Pasir)</text:p>
          </table:table-cell>
          <table:table-cell office:value-type="string" calcext:value-type="string">
            <text:p>Talking Toes - Atlas Stride Performance Sock</text:p>
          </table:table-cell>
          <table:table-cell office:value-type="float" office:value="8885021132099" calcext:value-type="float">
            <text:p>88850211320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9.9" calcext:value-type="float">
            <text:p>19.9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0.03%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27.75%</text:p>
          </table:table-cell>
          <table:table-cell table:style-name="ce1" office:value-type="string" calcext:value-type="string">
            <text:p>The Social Space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Cherry Cherry Crew</text:p>
          </table:table-cell>
          <table:table-cell office:value-type="float" office:value="8885021132891" calcext:value-type="float">
            <text:p>888502113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Cherry Cherry Crew</text:p>
          </table:table-cell>
          <table:table-cell office:value-type="float" office:value="8885021132907" calcext:value-type="float">
            <text:p>8885021132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Strawberry Time Crew</text:p>
          </table:table-cell>
          <table:table-cell office:value-type="float" office:value="8885021132914" calcext:value-type="float">
            <text:p>8885021132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63.6" calcext:value-type="float">
            <text:p>63.6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0.07%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13.29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All Ripe Bananas Crew</text:p>
          </table:table-cell>
          <table:table-cell office:value-type="float" office:value="8885021132938" calcext:value-type="float">
            <text:p>88850211329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All Ripe Bananas Crew</text:p>
          </table:table-cell>
          <table:table-cell office:value-type="float" office:value="8885021132945" calcext:value-type="float">
            <text:p>8885021132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0.07%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32.73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Peachy Life Crew</text:p>
          </table:table-cell>
          <table:table-cell office:value-type="float" office:value="8885021132952" calcext:value-type="float">
            <text:p>88850211329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0.04%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18.71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Galactic Sheep Crew</text:p>
          </table:table-cell>
          <table:table-cell office:value-type="float" office:value="8885021133034" calcext:value-type="float">
            <text:p>88850211330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0.06%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21.96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Galactic Sheep Crew</text:p>
          </table:table-cell>
          <table:table-cell office:value-type="float" office:value="8885021133041" calcext:value-type="float">
            <text:p>88850211330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0.02%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Holding Space Crew</text:p>
          </table:table-cell>
          <table:table-cell office:value-type="float" office:value="8885021133607" calcext:value-type="float">
            <text:p>8885021133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office:value-type="float" office:value="15.9" calcext:value-type="float">
            <text:p>15.9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0.02%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7.10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Cosmic Kitten Athletic</text:p>
          </table:table-cell>
          <table:table-cell office:value-type="float" office:value="8885021133614" calcext:value-type="float">
            <text:p>88850211336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47.7" calcext:value-type="float">
            <text:p>47.7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0.06%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24.96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alking Toes - Cosmic Kitten Athletic</text:p>
          </table:table-cell>
          <table:table-cell office:value-type="float" office:value="8885021133621" calcext:value-type="float">
            <text:p>888502113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alking To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1.8" calcext:value-type="float">
            <text:p>31.8</text:p>
          </table:table-cell>
          <table:table-cell office:value-type="float" office:value="28.62" calcext:value-type="float">
            <text:p>28.62</text:p>
          </table:table-cell>
          <table:table-cell office:value-type="string" calcext:value-type="string">
            <text:p>0.04%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27.74%</text:p>
          </table:table-cell>
          <table:table-cell/>
          <table:table-cell office:value-type="string" calcext:value-type="string">
            <text:p>Talking To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(15ml)</text:p>
          </table:table-cell>
          <table:table-cell office:value-type="float" office:value="8886481900426" calcext:value-type="float">
            <text:p>8886481900426</text:p>
          </table:table-cell>
          <table:table-cell office:value-type="string" calcext:value-type="string">
            <text:p>Bergamo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0.04%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(15ml)</text:p>
          </table:table-cell>
          <table:table-cell office:value-type="float" office:value="8886481900440" calcext:value-type="float">
            <text:p>8886481900440</text:p>
          </table:table-cell>
          <table:table-cell office:value-type="string" calcext:value-type="string">
            <text:p>Citronell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string" calcext:value-type="string">
            <text:p>0.04%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(15ml)</text:p>
          </table:table-cell>
          <table:table-cell office:value-type="float" office:value="8886481900488" calcext:value-type="float">
            <text:p>8886481900488</text:p>
          </table:table-cell>
          <table:table-cell office:value-type="string" calcext:value-type="string">
            <text:p>Geraniu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2.5" calcext:value-type="float">
            <text:p>32.5</text:p>
          </table:table-cell>
          <table:table-cell office:value-type="string" calcext:value-type="string">
            <text:p>0.05%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(15ml)</text:p>
          </table:table-cell>
          <table:table-cell office:value-type="float" office:value="8886481901508" calcext:value-type="float">
            <text:p>8886481901508</text:p>
          </table:table-cell>
          <table:table-cell office:value-type="string" calcext:value-type="string">
            <text:p>Juniper Berr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0.04%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(15ml)</text:p>
          </table:table-cell>
          <table:table-cell office:value-type="float" office:value="8886481901614" calcext:value-type="float">
            <text:p>8886481901614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string" calcext:value-type="string">
            <text:p>0.03%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ryasa - Essential Oil Blend</text:p>
          </table:table-cell>
          <table:table-cell office:value-type="float" office:value="8886481902420" calcext:value-type="float">
            <text:p>8886481902420</text:p>
          </table:table-cell>
          <table:table-cell office:value-type="string" calcext:value-type="string">
            <text:p>15ml Mood Enhancer Blen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ry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5.9" calcext:value-type="float">
            <text:p>35.9</text:p>
          </table:table-cell>
          <table:table-cell office:value-type="string" calcext:value-type="string">
            <text:p>0.06%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34.99%</text:p>
          </table:table-cell>
          <table:table-cell/>
          <table:table-cell office:value-type="string" calcext:value-type="string">
            <text:p>Irya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Papercranes Design - Spring Symphony Reusable Shopping Bag</text:p>
          </table:table-cell>
          <table:table-cell office:value-type="float" office:value="94418210" calcext:value-type="float">
            <text:p>94418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.05%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41.50%</text:p>
          </table:table-cell>
          <table:table-cell/>
          <table:table-cell office:value-type="string" calcext:value-type="string">
            <text:p>Papercranes Desig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inglapa - Birds &amp; Butterfly Scrunchies</text:p>
          </table:table-cell>
          <table:table-cell office:value-type="float" office:value="9780202107059" calcext:value-type="float">
            <text:p>97802021070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ingla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4%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34.96%</text:p>
          </table:table-cell>
          <table:table-cell/>
          <table:table-cell office:value-type="string" calcext:value-type="string">
            <text:p>Singlap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inglapa - Vanda Tea Towel</text:p>
          </table:table-cell>
          <table:table-cell office:value-type="float" office:value="9780202121048" calcext:value-type="float">
            <text:p>9780202121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inglap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%</text:p>
          </table:table-cell>
          <table:table-cell office:value-type="float" office:value="86.4" calcext:value-type="float">
            <text:p>86.4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0.12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Singlap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inglapa - Peranakan Shophouse Shopping Bag</text:p>
          </table:table-cell>
          <table:table-cell office:value-type="float" office:value="9780202156071" calcext:value-type="float">
            <text:p>97802021560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inglap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30.9" calcext:value-type="float">
            <text:p>30.9</text:p>
          </table:table-cell>
          <table:table-cell office:value-type="string" calcext:value-type="string">
            <text:p>0.05%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34.98%</text:p>
          </table:table-cell>
          <table:table-cell/>
          <table:table-cell office:value-type="string" calcext:value-type="string">
            <text:p>Singlap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Singlapa - Garden City Tea Towel</text:p>
          </table:table-cell>
          <table:table-cell office:value-type="float" office:value="9780202157016" calcext:value-type="float">
            <text:p>9780202157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inglap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%</text:p>
          </table:table-cell>
          <table:table-cell office:value-type="float" office:value="115.2" calcext:value-type="float">
            <text:p>115.2</text:p>
          </table:table-cell>
          <table:table-cell office:value-type="float" office:value="112.32" calcext:value-type="float">
            <text:p>112.32</text:p>
          </table:table-cell>
          <table:table-cell office:value-type="string" calcext:value-type="string">
            <text:p>0.17%</text:p>
          </table:table-cell>
          <table:table-cell office:value-type="float" office:value="37.44" calcext:value-type="float">
            <text:p>37.44</text:p>
          </table:table-cell>
          <table:table-cell office:value-type="string" calcext:value-type="string">
            <text:p>33.33%</text:p>
          </table:table-cell>
          <table:table-cell/>
          <table:table-cell office:value-type="string" calcext:value-type="string">
            <text:p>Singlap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Hi Buy Mama - Galileo and Galilei Storybook</text:p>
          </table:table-cell>
          <table:table-cell office:value-type="float" office:value="9789819414789" calcext:value-type="float">
            <text:p>97898194147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6" calcext:value-type="float">
            <text:p>36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0.05%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3.53%</text:p>
          </table:table-cell>
          <table:table-cell/>
          <table:table-cell office:value-type="string" calcext:value-type="string">
            <text:p>Hi Buy Ma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Awesome Women Series - Mighty Explorer's Journal</text:p>
          </table:table-cell>
          <table:table-cell office:value-type="float" office:value="9789819417278" calcext:value-type="float">
            <text:p>9789819417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wesome Women Ser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8%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Awesome Women Seri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Healing Balm</text:p>
          </table:table-cell>
          <table:table-cell office:value-type="string" calcext:value-type="string">
            <text:p>HB002</text:p>
          </table:table-cell>
          <table:table-cell office:value-type="string" calcext:value-type="string">
            <text:p>I Need Focu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35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Healing Balm</text:p>
          </table:table-cell>
          <table:table-cell office:value-type="string" calcext:value-type="string">
            <text:p>HB003</text:p>
          </table:table-cell>
          <table:table-cell office:value-type="string" calcext:value-type="string">
            <text:p>I Need Clarit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5%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57.73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Room Spray</text:p>
          </table:table-cell>
          <table:table-cell office:value-type="string" calcext:value-type="string">
            <text:p>RS001-50</text:p>
          </table:table-cell>
          <table:table-cell office:value-type="string" calcext:value-type="string">
            <text:p>Sweet Chil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39.6" calcext:value-type="float">
            <text:p>39.6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0.06%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36.84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Room Spray</text:p>
          </table:table-cell>
          <table:table-cell office:value-type="string" calcext:value-type="string">
            <text:p>RS003-50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string" calcext:value-type="string">
            <text:p>0.03%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Roll-On Perfume</text:p>
          </table:table-cell>
          <table:table-cell office:value-type="string" calcext:value-type="string">
            <text:p>RW001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.07%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Roll-On Perfume</text:p>
          </table:table-cell>
          <table:table-cell office:value-type="string" calcext:value-type="string">
            <text:p>RW00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3%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40.00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Roll-On Perfume</text:p>
          </table:table-cell>
          <table:table-cell office:value-type="string" calcext:value-type="string">
            <text:p>RW004</text:p>
          </table:table-cell>
          <table:table-cell office:value-type="string" calcext:value-type="string">
            <text:p>Positan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.07%</text:p>
          </table:table-cell>
          <table:table-cell office:value-type="float" office:value="38.17" calcext:value-type="float">
            <text:p>38.17</text:p>
          </table:table-cell>
          <table:table-cell office:value-type="string" calcext:value-type="string">
            <text:p>86.75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Innerfyre - Shower Steamer</text:p>
          </table:table-cell>
          <table:table-cell office:value-type="string" calcext:value-type="string">
            <text:p>SS00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56" calcext:value-type="float">
            <text:p>56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0.08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.78%</text:p>
          </table:table-cell>
          <table:table-cell/>
          <table:table-cell office:value-type="string" calcext:value-type="string">
            <text:p>Innerfy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Stainless Steel Straw (Bubble Tea)</text:p>
          </table:table-cell>
          <table:table-cell office:value-type="string" calcext:value-type="string">
            <text:p>TSSBUBBLETEASTRAW-2</text:p>
          </table:table-cell>
          <table:table-cell office:value-type="string" calcext:value-type="string">
            <text:p>Rose Gold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00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cial Space (Kreta Ayer)</text:p>
          </table:table-cell>
          <table:table-cell office:value-type="string" calcext:value-type="string">
            <text:p>TSS - Stainless Steel Straw (Bubble Tea)</text:p>
          </table:table-cell>
          <table:table-cell office:value-type="string" calcext:value-type="string">
            <text:p>TSSBUBBLETEASTRAW-3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TS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%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0.01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41.18%</text:p>
          </table:table-cell>
          <table:table-cell/>
          <table:table-cell office:value-type="string" calcext:value-type="string">
            <text:p>T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"/>
          <table:table-cell office:value-type="string" calcext:value-type="string">
            <text:p>Total: 452 item typ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080419.06" calcext:value-type="float">
            <text:p>57080419.06</text:p>
          </table:table-cell>
          <table:table-cell office:value-type="float" office:value="6551.8" calcext:value-type="float">
            <text:p>6551.8</text:p>
          </table:table-cell>
          <table:table-cell table:style-name="ce1" office:value-type="string" calcext:value-type="string">
            <text:p>-</text:p>
          </table:table-cell>
          <table:table-cell office:value-type="float" office:value="67686.65" calcext:value-type="float">
            <text:p>67686.65</text:p>
          </table:table-cell>
          <table:table-cell office:value-type="float" office:value="64711.9" calcext:value-type="float">
            <text:p>64711.9</text:p>
          </table:table-cell>
          <table:table-cell table:style-name="ce1" office:value-type="string" calcext:value-type="string">
            <text:p>-</text:p>
          </table:table-cell>
          <table:table-cell office:value-type="float" office:value="47067.53" calcext:value-type="float">
            <text:p>47067.5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2"/>
          <table:table-cell office:value-type="float" office:value="1802.95" calcext:value-type="float">
            <text:p>1802.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1:44:14.244288000</meta:creation-date>
    <meta:generator>LibreOffice/26.2.3.2$MacOSX_X86_64 LibreOffice_project/70e089b17412e4cb7773e41413306b17a2328c34</meta:generator>
    <dc:date>2026-05-16T11:44:38.007083000</dc:date>
    <meta:editing-duration>PT24S</meta:editing-duration>
    <meta:editing-cycles>1</meta:editing-cycles>
    <meta:document-statistic meta:table-count="1" meta:cell-count="8701" meta:object-count="0"/>
    <meta:user-defined meta:name=""/>
  </office:meta>
</office:document-meta>
</file>